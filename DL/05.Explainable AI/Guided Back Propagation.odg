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C000002FE57AA99EA.png" manifest:media-type="image/png"/>
  <manifest:file-entry manifest:full-path="Pictures/100000000000031200000080D072CBFF.png" manifest:media-type="image/png"/>
  <manifest:file-entry manifest:full-path="Pictures/100000000000081A00000254AA2EA359.jpg" manifest:media-type="image/jpeg"/>
  <manifest:file-entry manifest:full-path="Pictures/100000000000039C000004808D48C0D9.jpg" manifest:media-type="image/jpeg"/>
  <manifest:file-entry manifest:full-path="Pictures/100000000000043400000210241E82FE.jpg" manifest:media-type="image/jpeg"/>
  <manifest:file-entry manifest:full-path="Pictures/10000000000000980000002AB9D0CC06.png" manifest:media-type="image/png"/>
  <manifest:file-entry manifest:full-path="Pictures/1000000000000443000001390AA99E59.jpg" manifest:media-type="image/jpeg"/>
  <manifest:file-entry manifest:full-path="Pictures/1000000000000043000000247C77C0A2.png" manifest:media-type="image/png"/>
  <manifest:file-entry manifest:full-path="Pictures/10000001000006AF000003E6A0EE2A7E.png" manifest:media-type="image/png"/>
  <manifest:file-entry manifest:full-path="Pictures/1000000100000553000003001A398456.png" manifest:media-type="image/png"/>
  <manifest:file-entry manifest:full-path="Pictures/1000000000000295000000B1E9A43AEF.jpg" manifest:media-type="image/jpeg"/>
  <manifest:file-entry manifest:full-path="Pictures/10000000000000D9000000DBC5B189A0.jpg" manifest:media-type="image/jpeg"/>
  <manifest:file-entry manifest:full-path="Pictures/1000000100000477000001B4F96137A8.png" manifest:media-type="image/png"/>
  <manifest:file-entry manifest:full-path="Pictures/100000010000011D000001133F646627.png" manifest:media-type="image/png"/>
  <manifest:file-entry manifest:full-path="Pictures/10000000000000E20000020B59877B7A.jpg" manifest:media-type="image/jpeg"/>
  <manifest:file-entry manifest:full-path="Pictures/1000000100000556000003006B83556F.png" manifest:media-type="image/png"/>
  <manifest:file-entry manifest:full-path="Pictures/10000001000001680000014E382FE8B1.png" manifest:media-type="image/png"/>
  <manifest:file-entry manifest:full-path="Pictures/1000000100000490000001507C2D32F4.png" manifest:media-type="image/png"/>
  <manifest:file-entry manifest:full-path="Pictures/10000001000000730000001539B82B48.png" manifest:media-type="image/png"/>
  <manifest:file-entry manifest:full-path="Pictures/10000001000001350000011BBD1C4BFA.png" manifest:media-type="image/png"/>
  <manifest:file-entry manifest:full-path="Pictures/100000010000004E00000051E67E02DB.png" manifest:media-type="image/png"/>
  <manifest:file-entry manifest:full-path="Pictures/10000001000006CF0000046708080689.png" manifest:media-type="image/png"/>
  <manifest:file-entry manifest:full-path="Pictures/10000001000001170000011B13B0B7CB.png" manifest:media-type="image/png"/>
  <manifest:file-entry manifest:full-path="Pictures/10000000000000DF000000DC84499CC9.jpg" manifest:media-type="image/jpeg"/>
  <manifest:file-entry manifest:full-path="Pictures/10000001000001440000015797F4E492.png" manifest:media-type="image/png"/>
  <manifest:file-entry manifest:full-path="Pictures/1000000100000550000002F3B19E2206.png" manifest:media-type="image/png"/>
  <manifest:file-entry manifest:full-path="Pictures/10000001000004EB000002FDA6D885DE.png" manifest:media-type="image/png"/>
  <manifest:file-entry manifest:full-path="Pictures/10000000000001C200000480229D592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rial" svg:font-family="Arial"/>
    <style:font-face style:name="Arial1" svg:font-family="Arial" style:font-family-generic="system" style:font-pitch="variable"/>
    <style:font-face style:name="Bookman Old Style" svg:font-family="'Bookman Old Style'"/>
    <style:font-face style:name="BookmanOldStyle" svg:font-family="BookmanOldStyle"/>
    <style:font-face style:name="CambriaMath" svg:font-family="CambriaMat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29cm" fo:min-width="1.12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c00000" loext:decorative="false"/>
    </style:style>
    <style:style style:name="gr8" style:family="graphic" style:parent-style-name="standard">
      <style:graphic-properties draw:stroke="solid" svg:stroke-width="0.004cm" svg:stroke-color="#000000" draw:stroke-linejoin="miter" svg:stroke-linecap="butt" draw:fill="none" fo:padding-top="0.002cm" fo:padding-bottom="0.002cm" fo:padding-left="0.002cm" fo:padding-right="0.002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solid" svg:stroke-width="0.105cm" svg:stroke-color="#156082" draw:stroke-linejoin="round" svg:stroke-linecap="butt" draw:fill="none" fo:padding-top="0.052cm" fo:padding-bottom="0.052cm" fo:padding-left="0.052cm" fo:padding-right="0.052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46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156082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60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ffb9b9" loext:decorative="false"/>
    </style:style>
    <style:style style:name="gr20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46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000000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dash" draw:stroke-dash="stroke-dash92" svg:stroke-width="0.079cm" svg:stroke-color="#c00000" draw:stroke-linejoin="miter" svg:stroke-linecap="butt" draw:fill="none" fo:padding-top="0.039cm" fo:padding-bottom="0.039cm" fo:padding-left="0.039cm" fo:padding-right="0.039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45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38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51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33" style:family="graphic" style:parent-style-name="standard">
      <style:graphic-properties draw:stroke="solid" svg:stroke-width="0.052cm" svg:stroke-color="#156082" draw:stroke-linejoin="miter" svg:stroke-linecap="butt" draw:fill="none" fo:padding-top="0.026cm" fo:padding-bottom="0.026cm" fo:padding-left="0.026cm" fo:padding-right="0.026cm" loext:decorative="fals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79cm" svg:stroke-color="#e97132" draw:stroke-linejoin="round" svg:stroke-linecap="butt" draw:fill="none" fo:padding-top="0.039cm" fo:padding-bottom="0.039cm" fo:padding-left="0.039cm" fo:padding-right="0.039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4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c00000"/>
    </style:style>
    <style:style style:name="P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13" style:family="paragraph">
      <loext:graphic-properties draw:fill="solid" draw:fill-color="#156082"/>
    </style:style>
    <style:style style:name="P14" style:family="paragraph">
      <loext:graphic-properties draw:fill="none"/>
      <style:text-properties fo:font-size="17pt" style:font-size-asian="17pt" style:font-size-complex="17pt"/>
    </style:style>
    <style:style style:name="P15" style:family="paragraph">
      <loext:graphic-properties draw:fill="solid" draw:fill-color="#ffb9b9"/>
    </style:style>
    <style:style style:name="P1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text-properties fo:font-size="12pt" style:font-size-asian="12pt" style:font-size-complex="12pt"/>
    </style:style>
    <style:style style:name="P19" style:family="paragraph">
      <loext:graphic-properties draw:fill="none"/>
      <style:text-properties fo:font-size="13pt" style:font-size-asian="13pt" style:font-size-complex="13pt"/>
    </style:style>
    <style:style style:name="P20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21" style:family="paragraph">
      <loext:graphic-properties draw:fill="none"/>
      <style:text-properties fo:font-size="20pt" style:font-size-asian="20pt" style:font-size-complex="20pt"/>
    </style:style>
    <style:style style:name="P22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23" style:family="paragraph">
      <loext:graphic-properties draw:fill="none"/>
      <style:text-properties fo:font-size="24pt" style:font-size-asian="24pt" style:font-size-complex="24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fo:font-weight="bold"/>
    </style:style>
    <style:style style:name="T1" style:family="text">
      <style:text-properties fo:color="#000000" loext:opacity="100%" style:font-name="Bookman Old Style" fo:font-size="32.0999984741211pt" fo:font-weight="350" style:font-name-asian="Bookman Old Style" style:font-size-asian="32.0999984741211pt" style:font-weight-asian="350" style:font-name-complex="Bookman Old Style" style:font-size-complex="32.0999984741211pt" style:font-weight-complex="350"/>
    </style:style>
    <style:style style:name="T2" style:family="text">
      <style:text-properties fo:color="#000000" loext:opacity="100%" style:font-name="Bookman Old Style" fo:font-size="26.1000003814697pt" fo:font-weight="350" style:font-name-asian="Bookman Old Style" style:font-size-asian="26.1000003814697pt" style:font-weight-asian="350" style:font-name-complex="Bookman Old Style" style:font-size-complex="26.1000003814697pt" style:font-weight-complex="350"/>
    </style:style>
    <style:style style:name="T3" style:family="text">
      <style:text-properties fo:color="#000000" loext:opacity="100%" style:font-name="Bookman Old Style" fo:font-size="44.0999984741211pt" fo:font-weight="350" style:font-name-asian="Bookman Old Style" style:font-size-asian="44.0999984741211pt" style:font-weight-asian="350" style:font-name-complex="Bookman Old Style" style:font-size-complex="44.0999984741211pt" style:font-weight-complex="350"/>
    </style:style>
    <style:style style:name="T4" style:family="text">
      <style:text-properties fo:color="#000000" loext:opacity="100%" style:font-name="Bookman Old Style" fo:font-size="18pt" fo:font-weight="350" style:font-name-asian="Bookman Old Style" style:font-size-asian="18pt" style:font-weight-asian="350" style:font-name-complex="Bookman Old Style" style:font-size-complex="18pt" style:font-weight-complex="350"/>
    </style:style>
    <style:style style:name="T5" style:family="text">
      <style:text-properties fo:color="#000000" loext:opacity="100%" style:font-name="BookmanOldStyle" fo:font-size="18pt" fo:font-weight="350" style:font-name-asian="BookmanOldStyle" style:font-size-asian="18pt" style:font-weight-asian="350" style:font-name-complex="BookmanOldStyle" style:font-size-complex="18pt" style:font-weight-complex="350"/>
    </style:style>
    <style:style style:name="T6" style:family="text">
      <style:text-properties fo:color="#000000" loext:opacity="100%" style:font-name="Bookman Old Style" fo:font-size="18pt" fo:font-weight="600" style:font-name-asian="Bookman Old Style" style:font-size-asian="18pt" style:font-weight-asian="600" style:font-name-complex="Bookman Old Style" style:font-size-complex="18pt" style:font-weight-complex="600"/>
    </style:style>
    <style:style style:name="T7" style:family="text">
      <style:text-properties fo:color="#00b050" loext:opacity="100%" style:font-name="Bookman Old Style" fo:font-size="18pt" fo:font-weight="600" style:font-name-asian="Bookman Old Style" style:font-size-asian="18pt" style:font-weight-asian="600" style:font-name-complex="Bookman Old Style" style:font-size-complex="18pt" style:font-weight-complex="600"/>
    </style:style>
    <style:style style:name="T8" style:family="text">
      <style:text-properties fo:color="#c00000" loext:opacity="100%" style:font-name="Bookman Old Style" fo:font-size="18pt" fo:font-weight="600" style:font-name-asian="Bookman Old Style" style:font-size-asian="18pt" style:font-weight-asian="600" style:font-name-complex="Bookman Old Style" style:font-size-complex="18pt" style:font-weight-complex="600"/>
    </style:style>
    <style:style style:name="T9" style:family="text">
      <style:text-properties fo:color="#c00000" loext:opacity="100%" style:font-name="Bookman Old Style" fo:font-size="18pt" fo:font-weight="350" style:font-name-asian="Bookman Old Style" style:font-size-asian="18pt" style:font-weight-asian="350" style:font-name-complex="Bookman Old Style" style:font-size-complex="18pt" style:font-weight-complex="350"/>
    </style:style>
    <style:style style:name="T10" style:family="text">
      <style:text-properties fo:color="#c00000" loext:opacity="100%" style:font-name="CambriaMath" fo:font-size="18pt" fo:font-weight="normal" style:font-name-asian="CambriaMath" style:font-size-asian="18pt" style:font-weight-asian="normal" style:font-name-complex="CambriaMath" style:font-size-complex="18pt" style:font-weight-complex="normal"/>
    </style:style>
    <style:style style:name="T11" style:family="text">
      <style:text-properties fo:color="#0b76a0" loext:opacity="100%" style:font-name="Bookman Old Style" fo:font-size="11.1000003814697pt" fo:font-weight="600" style:font-name-asian="Bookman Old Style" style:font-size-asian="11.1000003814697pt" style:font-weight-asian="600" style:font-name-complex="Bookman Old Style" style:font-size-complex="11.1000003814697pt" style:font-weight-complex="600"/>
    </style:style>
    <style:style style:name="T12" style:family="text">
      <style:text-properties fo:color="#000000" loext:opacity="100%" style:font-name="Bookman Old Style" fo:font-size="16pt" fo:font-weight="350" style:font-name-asian="Bookman Old Style" style:font-size-asian="16pt" style:font-weight-asian="350" style:font-name-complex="Bookman Old Style" style:font-size-complex="16pt" style:font-weight-complex="350"/>
    </style:style>
    <style:style style:name="T13" style:family="text">
      <style:text-properties fo:color="#000000" loext:opacity="100%" style:font-name="Bookman Old Style" fo:font-size="16pt" fo:font-style="italic" fo:font-weight="350" style:font-name-asian="Bookman Old Style" style:font-size-asian="16pt" style:font-style-asian="italic" style:font-weight-asian="350" style:font-name-complex="Bookman Old Style" style:font-size-complex="16pt" style:font-style-complex="italic" style:font-weight-complex="350"/>
    </style:style>
    <style:style style:name="T14" style:family="text">
      <style:text-properties fo:color="#c00000" loext:opacity="100%" style:font-name="Bookman Old Style" fo:font-size="16pt" fo:font-weight="350" style:font-name-asian="Bookman Old Style" style:font-size-asian="16pt" style:font-weight-asian="350" style:font-name-complex="Bookman Old Style" style:font-size-complex="16pt" style:font-weight-complex="350"/>
    </style:style>
    <style:style style:name="T15" style:family="text">
      <style:text-properties fo:color="#c00000" loext:opacity="100%" style:font-name="CambriaMath" fo:font-size="16pt" fo:font-weight="normal" style:font-name-asian="CambriaMath" style:font-size-asian="16pt" style:font-weight-asian="normal" style:font-name-complex="CambriaMath" style:font-size-complex="16pt" style:font-weight-complex="normal"/>
    </style:style>
    <style:style style:name="T16" style:family="text">
      <style:text-properties fo:color="#c00000" loext:opacity="100%" style:font-name="BookmanOldStyle" fo:font-size="16pt" fo:font-weight="350" style:font-name-asian="BookmanOldStyle" style:font-size-asian="16pt" style:font-weight-asian="350" style:font-name-complex="BookmanOldStyle" style:font-size-complex="16pt" style:font-weight-complex="350"/>
    </style:style>
    <style:style style:name="T17" style:family="text">
      <style:text-properties fo:color="#000000" loext:opacity="100%" style:font-name="Wingdings" fo:font-size="18pt" fo:font-weight="normal" style:font-name-asian="Wingdings" style:font-size-asian="18pt" style:font-weight-asian="normal" style:font-name-complex="Wingdings" style:font-size-complex="18pt" style:font-weight-complex="normal"/>
    </style:style>
    <style:style style:name="T18" style:family="text">
      <style:text-properties fo:color="#000000" loext:opacity="100%" style:font-name="CambriaMath" fo:font-size="18pt" fo:font-weight="normal" style:font-name-asian="CambriaMath" style:font-size-asian="18pt" style:font-weight-asian="normal" style:font-name-complex="CambriaMath" style:font-size-complex="18pt" style:font-weight-complex="normal"/>
    </style:style>
    <style:style style:name="T19" style:family="text">
      <style:text-properties fo:color="#000000" loext:opacity="100%" style:font-name="CambriaMath" fo:font-size="13.1999998092651pt" fo:font-weight="normal" style:font-name-asian="CambriaMath" style:font-size-asian="13.1999998092651pt" style:font-weight-asian="normal" style:font-name-complex="CambriaMath" style:font-size-complex="13.1999998092651pt" style:font-weight-complex="normal"/>
    </style:style>
    <style:style style:name="T20" style:family="text">
      <style:text-properties fo:color="#0b76a0" loext:opacity="100%" style:font-name="Bookman Old Style" fo:font-size="17pt" fo:font-weight="600" style:font-name-asian="Bookman Old Style" style:font-size-asian="17pt" style:font-weight-asian="600" style:font-name-complex="Bookman Old Style" style:font-size-complex="17pt" style:font-weight-complex="600"/>
    </style:style>
    <style:style style:name="T21" style:family="text">
      <style:text-properties fo:color="#000000" loext:opacity="100%" style:font-name="Bookman Old Style" fo:font-size="17pt" fo:font-weight="350" style:font-name-asian="Bookman Old Style" style:font-size-asian="17pt" style:font-weight-asian="350" style:font-name-complex="Bookman Old Style" style:font-size-complex="17pt" style:font-weight-complex="350"/>
    </style:style>
    <style:style style:name="T22" style:family="text">
      <style:text-properties fo:color="#0b76a0" loext:opacity="100%" style:font-name="Bookman Old Style" fo:font-size="17pt" fo:font-style="italic" fo:font-weight="600" style:font-name-asian="Bookman Old Style" style:font-size-asian="17pt" style:font-style-asian="italic" style:font-weight-asian="600" style:font-name-complex="Bookman Old Style" style:font-size-complex="17pt" style:font-style-complex="italic" style:font-weight-complex="600"/>
    </style:style>
    <style:style style:name="T23" style:family="text">
      <style:text-properties fo:color="#c04f15" loext:opacity="100%" style:font-name="Bookman Old Style" fo:font-size="17pt" fo:font-weight="600" style:font-name-asian="Bookman Old Style" style:font-size-asian="17pt" style:font-weight-asian="600" style:font-name-complex="Bookman Old Style" style:font-size-complex="17pt" style:font-weight-complex="600"/>
    </style:style>
    <style:style style:name="T24" style:family="text">
      <style:text-properties fo:color="#c00000" loext:opacity="100%" style:font-name="Bookman Old Style" fo:font-size="17pt" fo:font-weight="600" style:font-name-asian="Bookman Old Style" style:font-size-asian="17pt" style:font-weight-asian="600" style:font-name-complex="Bookman Old Style" style:font-size-complex="17pt" style:font-weight-complex="600"/>
    </style:style>
    <style:style style:name="T25" style:family="text">
      <style:text-properties fo:color="#c00000" loext:opacity="100%" style:font-name="Bookman Old Style" fo:font-size="17pt" fo:font-weight="350" style:font-name-asian="Bookman Old Style" style:font-size-asian="17pt" style:font-weight-asian="350" style:font-name-complex="Bookman Old Style" style:font-size-complex="17pt" style:font-weight-complex="350"/>
    </style:style>
    <style:style style:name="T26" style:family="text">
      <style:text-properties fo:color="#000000" loext:opacity="100%" style:font-name="Bookman Old Style" fo:font-size="17pt" fo:font-style="italic" fo:font-weight="350" style:font-name-asian="Bookman Old Style" style:font-size-asian="17pt" style:font-style-asian="italic" style:font-weight-asian="350" style:font-name-complex="Bookman Old Style" style:font-size-complex="17pt" style:font-style-complex="italic" style:font-weight-complex="350"/>
    </style:style>
    <style:style style:name="T27" style:family="text">
      <style:text-properties fo:color="#000000" loext:opacity="100%" style:font-name="BookmanOldStyle" fo:font-size="17pt" fo:font-weight="350" style:font-name-asian="BookmanOldStyle" style:font-size-asian="17pt" style:font-weight-asian="350" style:font-name-complex="BookmanOldStyle" style:font-size-complex="17pt" style:font-weight-complex="350"/>
    </style:style>
    <style:style style:name="T28" style:family="text">
      <style:text-properties fo:color="#7030a0" loext:opacity="100%" style:font-name="Bookman Old Style" fo:font-size="18pt" fo:font-weight="600" style:font-name-asian="Bookman Old Style" style:font-size-asian="18pt" style:font-weight-asian="600" style:font-name-complex="Bookman Old Style" style:font-size-complex="18pt" style:font-weight-complex="600"/>
    </style:style>
    <style:style style:name="T29" style:family="text">
      <style:text-properties fo:color="#000000" loext:opacity="100%" style:font-name="Bookman Old Style" fo:font-size="14.1000003814697pt" fo:font-weight="600" style:font-name-asian="Bookman Old Style" style:font-size-asian="14.1000003814697pt" style:font-weight-asian="600" style:font-name-complex="Bookman Old Style" style:font-size-complex="14.1000003814697pt" style:font-weight-complex="600"/>
    </style:style>
    <style:style style:name="T30" style:family="text">
      <style:text-properties fo:color="#ff0000" loext:opacity="100%" style:font-name="CambriaMath" fo:font-size="18pt" fo:font-weight="normal" style:font-name-asian="CambriaMath" style:font-size-asian="18pt" style:font-weight-asian="normal" style:font-name-complex="CambriaMath" style:font-size-complex="18pt" style:font-weight-complex="normal"/>
    </style:style>
    <style:style style:name="T31" style:family="text">
      <style:text-properties fo:color="#ff0000" loext:opacity="100%" style:font-name="CambriaMath" fo:font-size="13.1999998092651pt" fo:font-weight="normal" style:font-name-asian="CambriaMath" style:font-size-asian="13.1999998092651pt" style:font-weight-asian="normal" style:font-name-complex="CambriaMath" style:font-size-complex="13.1999998092651pt" style:font-weight-complex="normal"/>
    </style:style>
    <style:style style:name="T32" style:family="text">
      <style:text-properties fo:color="#c00000" loext:opacity="100%" style:font-name="Bookman Old Style" fo:font-size="16pt" fo:font-weight="600" style:font-name-asian="Bookman Old Style" style:font-size-asian="16pt" style:font-weight-asian="600" style:font-name-complex="Bookman Old Style" style:font-size-complex="16pt" style:font-weight-complex="600"/>
    </style:style>
    <style:style style:name="T33" style:family="text">
      <style:text-properties fo:color="#000000" loext:opacity="100%" style:font-name="CambriaMath" fo:font-size="16pt" fo:font-weight="normal" style:font-name-asian="CambriaMath" style:font-size-asian="16pt" style:font-weight-asian="normal" style:font-name-complex="CambriaMath" style:font-size-complex="16pt" style:font-weight-complex="normal"/>
    </style:style>
    <style:style style:name="T34" style:family="text">
      <style:text-properties fo:color="#222222" loext:opacity="100%" style:font-name="Bookman Old Style" fo:font-size="12pt" fo:font-weight="350" style:font-name-asian="Bookman Old Style" style:font-size-asian="12pt" style:font-weight-asian="350" style:font-name-complex="Bookman Old Style" style:font-size-complex="12pt" style:font-weight-complex="350"/>
    </style:style>
    <style:style style:name="T35" style:family="text">
      <style:text-properties fo:color="#222222" loext:opacity="100%" style:font-name="Bookman Old Style" fo:font-size="12pt" fo:font-style="italic" fo:font-weight="350" style:font-name-asian="Bookman Old Style" style:font-size-asian="12pt" style:font-style-asian="italic" style:font-weight-asian="350" style:font-name-complex="Bookman Old Style" style:font-size-complex="12pt" style:font-style-complex="italic" style:font-weight-complex="350"/>
    </style:style>
    <style:style style:name="T36" style:family="text">
      <style:text-properties fo:color="#000000" loext:opacity="100%" style:font-name="CambriaMath" fo:font-size="13pt" fo:font-weight="normal" style:font-name-asian="CambriaMath" style:font-size-asian="13pt" style:font-weight-asian="normal" style:font-name-complex="CambriaMath" style:font-size-complex="13pt" style:font-weight-complex="normal"/>
    </style:style>
    <style:style style:name="T37" style:family="text">
      <style:text-properties fo:color="#000000" loext:opacity="100%" style:font-name="CambriaMath" fo:font-size="10.8000001907349pt" fo:font-weight="normal" style:font-name-asian="CambriaMath" style:font-size-asian="10.8000001907349pt" style:font-weight-asian="normal" style:font-name-complex="CambriaMath" style:font-size-complex="10.8000001907349pt" style:font-weight-complex="normal"/>
    </style:style>
    <style:style style:name="T38" style:family="text">
      <style:text-properties fo:color="#000000" loext:opacity="100%" style:font-name="Bookman Old Style" fo:font-size="14.1000003814697pt" fo:font-weight="350" style:font-name-asian="Bookman Old Style" style:font-size-asian="14.1000003814697pt" style:font-weight-asian="350" style:font-name-complex="Bookman Old Style" style:font-size-complex="14.1000003814697pt" style:font-weight-complex="350"/>
    </style:style>
    <style:style style:name="T39" style:family="text">
      <style:text-properties fo:color="#000000" loext:opacity="100%" style:font-name="Wingdings" fo:font-size="16pt" fo:font-weight="normal" style:font-name-asian="Wingdings" style:font-size-asian="16pt" style:font-weight-asian="normal" style:font-name-complex="Wingdings" style:font-size-complex="16pt" style:font-weight-complex="normal"/>
    </style:style>
    <style:style style:name="T40" style:family="text">
      <style:text-properties fo:color="#000000" loext:opacity="100%" style:font-name="BookmanOldStyle" fo:font-size="16pt" fo:font-weight="350" style:font-name-asian="BookmanOldStyle" style:font-size-asian="16pt" style:font-weight-asian="350" style:font-name-complex="BookmanOldStyle" style:font-size-complex="16pt" style:font-weight-complex="350"/>
    </style:style>
    <style:style style:name="T41" style:family="text">
      <style:text-properties fo:color="#ffc000" loext:opacity="100%" style:font-name="CambriaMath" fo:font-size="20pt" fo:font-weight="normal" style:font-name-asian="CambriaMath" style:font-size-asian="20pt" style:font-weight-asian="normal" style:font-name-complex="CambriaMath" style:font-size-complex="20pt" style:font-weight-complex="normal"/>
    </style:style>
    <style:style style:name="T42" style:family="text">
      <style:text-properties fo:color="#ffc000" loext:opacity="100%" style:font-name="CambriaMath" fo:font-size="14.6999998092651pt" fo:font-weight="normal" style:font-name-asian="CambriaMath" style:font-size-asian="14.6999998092651pt" style:font-weight-asian="normal" style:font-name-complex="CambriaMath" style:font-size-complex="14.6999998092651pt" style:font-weight-complex="normal"/>
    </style:style>
    <style:style style:name="T43" style:family="text">
      <style:text-properties fo:color="#ffc000" loext:opacity="100%" style:font-name="Aptos" fo:font-size="20pt" fo:font-weight="normal" style:font-name-asian="Aptos" style:font-size-asian="20pt" style:font-weight-asian="normal" style:font-name-complex="Aptos" style:font-size-complex="20pt" style:font-weight-complex="normal"/>
    </style:style>
    <style:style style:name="T44" style:family="text">
      <style:text-properties fo:color="#000000" loext:opacity="100%" style:font-name="BookmanOldStyle" fo:font-size="14.1000003814697pt" fo:font-weight="bold" style:font-name-asian="BookmanOldStyle" style:font-size-asian="14.1000003814697pt" style:font-weight-asian="bold" style:font-name-complex="BookmanOldStyle" style:font-size-complex="14.1000003814697pt" style:font-weight-complex="bold"/>
    </style:style>
    <style:style style:name="T45" style:family="text">
      <style:text-properties fo:color="#000000" loext:opacity="100%" style:font-name="CambriaMath" fo:font-size="20pt" fo:font-weight="normal" style:font-name-asian="CambriaMath" style:font-size-asian="20pt" style:font-weight-asian="normal" style:font-name-complex="CambriaMath" style:font-size-complex="20pt" style:font-weight-complex="normal"/>
    </style:style>
    <style:style style:name="T46" style:family="text">
      <style:text-properties fo:color="#000000" loext:opacity="100%" style:font-name="CambriaMath" fo:font-size="14.6999998092651pt" fo:font-weight="normal" style:font-name-asian="CambriaMath" style:font-size-asian="14.6999998092651pt" style:font-weight-asian="normal" style:font-name-complex="CambriaMath" style:font-size-complex="14.6999998092651pt" style:font-weight-complex="normal"/>
    </style:style>
    <style:style style:name="T47" style:family="text">
      <style:text-properties fo:color="#000000" loext:opacity="100%" style:font-name="CambriaMath" fo:font-size="24pt" fo:font-weight="normal" style:font-name-asian="CambriaMath" style:font-size-asian="24pt" style:font-weight-asian="normal" style:font-name-complex="CambriaMath" style:font-size-complex="24pt" style:font-weight-complex="normal"/>
    </style:style>
    <style:style style:name="T48" style:family="text">
      <style:text-properties fo:color="#000000" loext:opacity="100%" style:font-name="Bookman Old Style" fo:font-size="16pt" fo:font-style="italic" fo:font-weight="600" style:font-name-asian="Bookman Old Style" style:font-size-asian="16pt" style:font-style-asian="italic" style:font-weight-asian="600" style:font-name-complex="Bookman Old Style" style:font-size-complex="16pt" style:font-style-complex="italic" style:font-weight-complex="600"/>
    </style:style>
    <style:style style:name="T49" style:family="text">
      <style:text-properties fo:color="#c00000" loext:opacity="100%" style:font-name="Wingdings" fo:font-size="16pt" fo:font-weight="normal" style:font-name-asian="Wingdings" style:font-size-asian="16pt" style:font-weight-asian="normal" style:font-name-complex="Wingdings" style:font-size-complex="16pt" style:font-weight-complex="normal"/>
    </style:style>
    <style:style style:name="T50" style:family="text">
      <style:text-properties fo:color="#00b050" loext:opacity="100%" style:font-name="Wingdings" fo:font-size="16pt" fo:font-weight="normal" style:font-name-asian="Wingdings" style:font-size-asian="16pt" style:font-weight-asian="normal" style:font-name-complex="Wingdings" style:font-size-complex="16pt" style:font-weight-complex="normal"/>
    </style:style>
    <style:style style:name="T51" style:family="text">
      <style:text-properties fo:color="#00b050" loext:opacity="100%" style:font-name="Bookman Old Style" fo:font-size="16pt" fo:font-weight="600" style:font-name-asian="Bookman Old Style" style:font-size-asian="16pt" style:font-weight-asian="600" style:font-name-complex="Bookman Old Style" style:font-size-complex="16pt" style:font-weight-complex="600"/>
    </style:style>
    <style:style style:name="T52" style:family="text">
      <style:text-properties fo:color="#000000" loext:opacity="100%" style:font-name="Bookman Old Style" fo:font-size="16pt" fo:font-weight="600" style:font-name-asian="Bookman Old Style" style:font-size-asian="16pt" style:font-weight-asian="600" style:font-name-complex="Bookman Old Style" style:font-size-complex="16pt" style:font-weight-complex="600"/>
    </style:style>
    <style:style style:name="T53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54" style:family="text">
      <style:text-properties fo:color="#ff0000" loext:opacity="100%" style:font-name="Bookman Old Style" fo:font-size="16pt" fo:font-weight="600" style:font-name-asian="Bookman Old Style" style:font-size-asian="16pt" style:font-weight-asian="600" style:font-name-complex="Bookman Old Style" style:font-size-complex="16pt" style:font-weight-complex="600"/>
    </style:style>
    <style:style style:name="T55" style:family="text">
      <style:text-properties fo:color="#96dcf8" loext:opacity="100%" style:font-name="Bookman Old Style" fo:font-size="16pt" fo:font-weight="600" style:font-name-asian="Bookman Old Style" style:font-size-asian="16pt" style:font-weight-asian="600" style:font-name-complex="Bookman Old Style" style:font-size-complex="1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5cm" svg:x="0cm" svg:y="0cm" svg:viewBox="0 0 33867 19051" draw:points="0,19051 33867,19051 33867,0 0,0">
          <text:p/>
        </draw:polygon>
        <draw:frame draw:style-name="gr2" draw:text-style-name="P3" draw:layer="layout" svg:width="33.368cm" svg:height="1.326cm" svg:x="0.284cm" svg:y="6.22cm">
          <draw:text-box>
            <text:p text:style-name="P2"><text:span text:style-name="T1">Explainable AI: Concepts, Techniques, and Implementations</text:span></text:p>
          </draw:text-box>
        </draw:frame>
        <draw:frame draw:style-name="gr3" draw:text-style-name="P4" draw:layer="layout" svg:width="30.756cm" svg:height="1.077cm" svg:x="1.744cm" svg:y="7.817cm">
          <draw:text-box>
            <text:p text:style-name="P2"><text:span text:style-name="T2">From Taxonomy to Practical Methods (LIME, SHAP, Grad-CAM, and </text:span></text:p>
          </draw:text-box>
        </draw:frame>
        <draw:frame draw:style-name="gr3" draw:text-style-name="P4" draw:layer="layout" svg:width="3.621cm" svg:height="1.077cm" svg:x="15.149cm" svg:y="8.807cm">
          <draw:text-box>
            <text:p text:style-name="P2"><text:span text:style-name="T2">Beyond)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19.05cm" svg:x="0cm" svg:y="0cm" svg:viewBox="0 0 33867 19051" draw:points="0,19051 33867,19051 33867,0 0,0">
          <text:p/>
        </draw:polygon>
        <draw:frame draw:style-name="gr4" draw:text-style-name="P5" draw:layer="layout" svg:width="26.348cm" svg:height="7.575cm" svg:x="2.611cm" svg:y="4.185cm">
          <draw:image xlink:href="Pictures/100000000000081A00000254AA2EA359.jpg" xlink:type="simple" xlink:show="embed" xlink:actuate="onLoad" draw:mime-type="image/jpeg">
            <text:p/>
          </draw:image>
        </draw:frame>
        <draw:frame draw:style-name="gr5" draw:text-style-name="P6" draw:layer="layout" svg:width="18.709cm" svg:height="1.826cm" svg:x="0.677cm" svg:y="0.911cm">
          <draw:text-box>
            <text:p text:style-name="P2"><text:span text:style-name="T3">Guided backpropagation</text:span></text:p>
          </draw:text-box>
        </draw:frame>
        <draw:frame draw:style-name="gr6" draw:text-style-name="P7" draw:layer="layout" svg:width="31.369cm" svg:height="0.746cm" svg:x="0.877cm" svg:y="14.989cm">
          <draw:text-box>
            <text:p text:style-name="P2"><text:span text:style-name="T4">This image is passed into the CNN, where it goes through many layers </text:span><text:span text:style-name="T5">— </text:span><text:span text:style-name="T4">convolution, ReLU, pooling.</text:span></text:p>
          </draw:text-box>
        </draw:frame>
        <draw:frame draw:style-name="gr6" draw:text-style-name="P7" draw:layer="layout" svg:width="31.207cm" svg:height="0.746cm" svg:x="0.877cm" svg:y="15.984cm">
          <draw:text-box>
            <text:p text:style-name="P2"><text:span text:style-name="T6">Guided Backpropagation </text:span><text:span text:style-name="T4">is an XAI technique that helps us understand </text:span><text:span text:style-name="T7">which pixels of the input </text:span></text:p>
          </draw:text-box>
        </draw:frame>
        <draw:frame draw:style-name="gr6" draw:text-style-name="P7" draw:layer="layout" svg:width="31.029cm" svg:height="0.746cm" svg:x="0.877cm" svg:y="16.747cm">
          <draw:text-box>
            <text:p text:style-name="P2"><text:span text:style-name="T7">image positively contributed</text:span><text:span text:style-name="T8"> </text:span><text:span text:style-name="T7">the most </text:span><text:span text:style-name="T4">to the model</text:span><text:span text:style-name="T5">’</text:span><text:span text:style-name="T4">s prediction by </text:span><text:span text:style-name="T7">calculating the gradients of </text:span></text:p>
          </draw:text-box>
        </draw:frame>
        <draw:path draw:style-name="gr7" draw:text-style-name="P8" draw:layer="layout" svg:width="21.191cm" svg:height="0.238cm" svg:x="4.797cm" svg:y="4.177cm" svg:viewBox="0 0 21192 239" svg:d="M0 30l20993 49v79l-20993-49zM20953 0l239 119-239 120z">
          <text:p/>
        </draw:path>
        <draw:polygon draw:style-name="gr8" draw:text-style-name="P5" draw:layer="layout" svg:width="13.983cm" svg:height="1.342cm" svg:x="8.525cm" svg:y="3.2cm" svg:viewBox="0 0 13984 1343" draw:points="0,1343 13984,1343 13984,0 0,0">
          <text:p/>
        </draw:polygon>
        <draw:frame draw:style-name="gr6" draw:text-style-name="P7" draw:layer="layout" svg:width="14.988cm" svg:height="0.746cm" svg:x="0.877cm" svg:y="17.509cm">
          <draw:text-box>
            <text:p text:style-name="P2"><text:span text:style-name="T7">the class score</text:span><text:span text:style-name="T4"> with respect to the input image.</text:span></text:p>
          </draw:text-box>
        </draw:frame>
        <draw:frame draw:style-name="gr6" draw:text-style-name="P7" draw:layer="layout" svg:width="8.269cm" svg:height="0.746cm" svg:x="8.91cm" svg:y="3.406cm">
          <draw:text-box>
            <text:p text:style-name="P2"><text:span text:style-name="T8">Forward pass </text:span><text:span text:style-name="T9">(from input </text:span></text:p>
          </draw:text-box>
        </draw:frame>
        <draw:frame draw:style-name="gr6" draw:text-style-name="P7" draw:layer="layout" svg:width="0.634cm" svg:height="0.636cm" svg:x="17.175cm" svg:y="3.51cm">
          <draw:text-box>
            <text:p text:style-name="P2"><text:span text:style-name="T10">→</text:span></text:p>
          </draw:text-box>
        </draw:frame>
        <draw:frame draw:style-name="gr6" draw:text-style-name="P7" draw:layer="layout" svg:width="3.774cm" svg:height="0.746cm" svg:x="17.708cm" svg:y="3.406cm">
          <draw:text-box>
            <text:p text:style-name="P2"><text:span text:style-name="T9"><text:s/>class score)</text:span></text:p>
          </draw:text-box>
        </draw:frame>
        <draw:frame draw:style-name="gr9" draw:text-style-name="P9" draw:layer="layout" svg:width="5.026cm" svg:height="0.458cm" svg:x="5.946cm" svg:y="5.008cm">
          <draw:text-box>
            <text:p text:style-name="P2"><text:span text:style-name="T11">early layers detect edges</text:span></text:p>
          </draw:text-box>
        </draw:frame>
        <draw:frame draw:style-name="gr9" draw:text-style-name="P9" draw:layer="layout" svg:width="5.353cm" svg:height="0.458cm" svg:x="9.31cm" svg:y="11.17cm">
          <draw:text-box>
            <text:p text:style-name="P2"><text:span text:style-name="T11">mid layers detect textures</text:span></text:p>
          </draw:text-box>
        </draw:frame>
        <draw:frame draw:style-name="gr9" draw:text-style-name="P9" draw:layer="layout" svg:width="6.241cm" svg:height="0.458cm" svg:x="12.321cm" svg:y="5.082cm">
          <draw:text-box>
            <text:p text:style-name="P2"><text:span text:style-name="T11">later layers detect object parts</text:span></text:p>
          </draw:text-box>
        </draw:frame>
        <draw:frame draw:style-name="gr10" draw:text-style-name="P10" draw:layer="layout" svg:width="9.54cm" svg:height="0.661cm" svg:x="23.046cm" svg:y="2.081cm">
          <draw:text-box>
            <text:p text:style-name="P2"><text:span text:style-name="T12">Suppose the model predicts </text:span><text:span text:style-name="T13">Zebra</text:span><text:span text:style-name="T12">.</text:span></text:p>
          </draw:text-box>
        </draw:frame>
        <draw:frame draw:style-name="gr10" draw:text-style-name="P10" draw:layer="layout" svg:width="7.906cm" svg:height="0.661cm" svg:x="23.046cm" svg:y="2.758cm">
          <draw:text-box>
            <text:p text:style-name="P2"><text:span text:style-name="T12">We want to see which pixels </text:span></text:p>
          </draw:text-box>
        </draw:frame>
        <draw:frame draw:style-name="gr10" draw:text-style-name="P10" draw:layer="layout" svg:width="8.695cm" svg:height="0.661cm" svg:x="23.046cm" svg:y="3.436cm">
          <draw:text-box>
            <text:p text:style-name="P2"><text:span text:style-name="T12">contributed to this Zebra score.</text:span></text:p>
          </draw:text-box>
        </draw:frame>
        <draw:frame draw:style-name="gr10" draw:text-style-name="P10" draw:layer="layout" svg:width="4.01cm" svg:height="0.661cm" svg:x="28.927cm" svg:y="5.125cm">
          <draw:text-box>
            <text:p text:style-name="P2"><text:span text:style-name="T12">To do this, we </text:span></text:p>
          </draw:text-box>
        </draw:frame>
        <draw:frame draw:style-name="gr10" draw:text-style-name="P10" draw:layer="layout" svg:width="3.617cm" svg:height="0.661cm" svg:x="28.927cm" svg:y="5.803cm">
          <draw:text-box>
            <text:p text:style-name="P2"><text:span text:style-name="T12">compute the </text:span></text:p>
          </draw:text-box>
        </draw:frame>
        <draw:frame draw:style-name="gr10" draw:text-style-name="P10" draw:layer="layout" svg:width="4.191cm" svg:height="0.661cm" svg:x="28.927cm" svg:y="6.48cm">
          <draw:text-box>
            <text:p text:style-name="P2"><text:span text:style-name="T12">gradient of the </text:span></text:p>
          </draw:text-box>
        </draw:frame>
        <draw:frame draw:style-name="gr10" draw:text-style-name="P10" draw:layer="layout" svg:width="4.754cm" svg:height="0.661cm" svg:x="28.927cm" svg:y="7.157cm">
          <draw:text-box>
            <text:p text:style-name="P2"><text:span text:style-name="T12">Zebra score with </text:span></text:p>
          </draw:text-box>
        </draw:frame>
        <draw:frame draw:style-name="gr10" draw:text-style-name="P10" draw:layer="layout" svg:width="3.932cm" svg:height="0.661cm" svg:x="28.927cm" svg:y="7.835cm">
          <draw:text-box>
            <text:p text:style-name="P2"><text:span text:style-name="T12">respect to the </text:span></text:p>
          </draw:text-box>
        </draw:frame>
        <draw:frame draw:style-name="gr11" draw:text-style-name="P10" draw:layer="layout" svg:width="3.887cm" svg:height="0.661cm" svg:x="28.927cm" svg:y="8.511cm">
          <draw:text-box>
            <text:p text:style-name="P2"><text:span text:style-name="T12">activations in </text:span></text:p>
          </draw:text-box>
        </draw:frame>
        <draw:polygon draw:style-name="gr12" draw:text-style-name="P5" draw:layer="layout" svg:width="1.317cm" svg:height="0.682cm" svg:x="27.258cm" svg:y="7.69cm" svg:viewBox="0 0 1318 683" draw:points="0,683 1318,683 1318,0 0,0">
          <text:p/>
        </draw:polygon>
        <draw:frame draw:style-name="gr4" draw:text-style-name="P5" draw:layer="layout" svg:width="4.618cm" svg:height="0.888cm" svg:x="21.369cm" svg:y="11.161cm">
          <draw:image xlink:href="Pictures/10000000000000980000002AB9D0CC06.png" xlink:type="simple" xlink:show="embed" xlink:actuate="onLoad" draw:mime-type="image/png">
            <text:p/>
          </draw:image>
        </draw:frame>
        <draw:frame draw:style-name="gr4" draw:text-style-name="P5" draw:layer="layout" svg:width="1.417cm" svg:height="0.761cm" svg:x="20.246cm" svg:y="11.612cm">
          <draw:image xlink:href="Pictures/1000000000000043000000247C77C0A2.png" xlink:type="simple" xlink:show="embed" xlink:actuate="onLoad" draw:mime-type="image/png">
            <text:p/>
          </draw:image>
        </draw:frame>
        <draw:path draw:style-name="gr7" draw:text-style-name="P8" draw:layer="layout" svg:width="21.731cm" svg:height="0.238cm" svg:x="4.797cm" svg:y="12.255cm" svg:viewBox="0 0 21732 239" svg:d="M21732 80h-21533v79h21533zM238 0l-238 120 238 119z">
          <text:p/>
        </draw:path>
        <draw:polygon draw:style-name="gr8" draw:text-style-name="P5" draw:layer="layout" svg:width="21.861cm" svg:height="2.646cm" svg:x="4.792cm" svg:y="12.276cm" svg:viewBox="0 0 21862 2647" draw:points="0,2647 21862,2647 21862,0 0,0">
          <text:p/>
        </draw:polygon>
        <draw:frame draw:style-name="gr10" draw:text-style-name="P10" draw:layer="layout" svg:width="2.986cm" svg:height="0.661cm" svg:x="28.927cm" svg:y="9.19cm">
          <draw:text-box>
            <text:p text:style-name="P2"><text:span text:style-name="T12">each layer.</text:span></text:p>
          </draw:text-box>
        </draw:frame>
        <draw:frame draw:style-name="gr6" draw:text-style-name="P7" draw:layer="layout" svg:width="5.057cm" svg:height="0.746cm" svg:x="5.174cm" svg:y="12.484cm">
          <draw:text-box>
            <text:p text:style-name="P2"><text:span text:style-name="T8">Backward pass </text:span></text:p>
          </draw:text-box>
        </draw:frame>
        <draw:frame draw:style-name="gr10" draw:text-style-name="P10" draw:layer="layout" svg:width="8.83cm" svg:height="0.661cm" svg:x="10.238cm" svg:y="12.551cm">
          <draw:text-box>
            <text:p text:style-name="P2"><text:span text:style-name="T14">(take gradient of the zebra score</text:span></text:p>
          </draw:text-box>
        </draw:frame>
        <draw:frame draw:style-name="gr10" draw:text-style-name="P10" draw:layer="layout" svg:width="0.722cm" svg:height="0.564cm" svg:x="19.095cm" svg:y="12.644cm">
          <draw:text-box>
            <text:p text:style-name="P2"><text:span text:style-name="T15"><text:s/>→ </text:span></text:p>
          </draw:text-box>
        </draw:frame>
        <draw:frame draw:style-name="gr10" draw:text-style-name="P10" draw:layer="layout" svg:width="5.452cm" svg:height="0.661cm" svg:x="19.814cm" svg:y="12.551cm">
          <draw:text-box>
            <text:p text:style-name="P2"><text:span text:style-name="T14">pass it through the </text:span></text:p>
          </draw:text-box>
        </draw:frame>
        <draw:frame draw:style-name="gr10" draw:text-style-name="P10" draw:layer="layout" svg:width="5.992cm" svg:height="0.661cm" svg:x="5.174cm" svg:y="13.237cm">
          <draw:text-box>
            <text:p text:style-name="P2"><text:span text:style-name="T14">fully connected layers</text:span></text:p>
          </draw:text-box>
        </draw:frame>
        <draw:frame draw:style-name="gr10" draw:text-style-name="P10" draw:layer="layout" svg:width="0.598cm" svg:height="0.564cm" svg:x="11.195cm" svg:y="13.329cm">
          <draw:text-box>
            <text:p text:style-name="P2"><text:span text:style-name="T15"><text:s/>→</text:span></text:p>
          </draw:text-box>
        </draw:frame>
        <draw:frame draw:style-name="gr10" draw:text-style-name="P10" draw:layer="layout" svg:width="11.015cm" svg:height="0.661cm" svg:x="11.948cm" svg:y="13.237cm">
          <draw:text-box>
            <text:p text:style-name="P2"><text:span text:style-name="T16">then through convolution + ReLU layers</text:span></text:p>
          </draw:text-box>
        </draw:frame>
        <draw:frame draw:style-name="gr10" draw:text-style-name="P10" draw:layer="layout" svg:width="0.562cm" svg:height="0.564cm" svg:x="23.173cm" svg:y="13.329cm">
          <draw:text-box>
            <text:p text:style-name="P2"><text:span text:style-name="T15">→</text:span></text:p>
          </draw:text-box>
        </draw:frame>
        <draw:frame draw:style-name="gr10" draw:text-style-name="P10" draw:layer="layout" svg:width="1.871cm" svg:height="0.661cm" svg:x="23.803cm" svg:y="13.237cm">
          <draw:text-box>
            <text:p text:style-name="P2"><text:span text:style-name="T16">finally </text:span></text:p>
          </draw:text-box>
        </draw:frame>
        <draw:frame draw:style-name="gr4" draw:text-style-name="P5" draw:layer="layout" svg:width="21.731cm" svg:height="12.684cm" svg:x="9.838cm" svg:y="5.127cm">
          <draw:image xlink:href="Pictures/10000001000006AF000003E6A0EE2A7E.png" xlink:type="simple" xlink:show="embed" xlink:actuate="onLoad" draw:mime-type="image/png">
            <text:p/>
          </draw:image>
        </draw:frame>
        <draw:frame draw:style-name="gr10" draw:text-style-name="P10" draw:layer="layout" svg:width="8.841cm" svg:height="0.661cm" svg:x="5.174cm" svg:y="13.914cm">
          <draw:text-box>
            <text:p text:style-name="P2"><text:span text:style-name="T16">reaching the input image pixels</text:span><text:span text:style-name="T14">)</text:span></text:p>
          </draw:text-box>
        </draw:frame>
      </draw:page>
      <draw:page draw:name="page3" draw:style-name="dp1" draw:master-page-name="master-page3">
        <draw:frame draw:style-name="gr13" draw:text-style-name="P11" draw:layer="layout" svg:width="32.033cm" svg:height="18.049cm" svg:x="1.217cm" svg:y="0.451cm">
          <draw:image xlink:href="Pictures/1000000100000553000003001A398456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polygon draw:style-name="gr1" draw:text-style-name="P1" draw:layer="layout" svg:width="33.866cm" svg:height="19.05cm" svg:x="0cm" svg:y="0cm" svg:viewBox="0 0 33867 19051" draw:points="0,19051 33867,19051 33867,0 0,0">
          <text:p/>
        </draw:polygon>
        <draw:frame draw:style-name="gr4" draw:text-style-name="P5" draw:layer="layout" svg:width="13.856cm" svg:height="2.26cm" svg:x="2.153cm" svg:y="1.131cm">
          <draw:image xlink:href="Pictures/100000000000031200000080D072CBFF.png" xlink:type="simple" xlink:show="embed" xlink:actuate="onLoad" draw:mime-type="image/png">
            <text:p/>
          </draw:image>
        </draw:frame>
        <draw:polygon draw:style-name="gr8" draw:text-style-name="P5" draw:layer="layout" svg:width="16.29cm" svg:height="3.628cm" svg:x="0.762cm" svg:y="3.323cm" svg:viewBox="0 0 16291 3629" draw:points="0,3629 16291,3629 16291,0 0,0">
          <text:p/>
        </draw:polygon>
        <draw:frame draw:style-name="gr6" draw:text-style-name="P7" draw:layer="layout" svg:width="0.634cm" svg:height="0.708cm" svg:x="1.117cm" svg:y="3.554cm">
          <draw:text-box>
            <text:p text:style-name="P2"><text:span text:style-name="T17">➢</text:span></text:p>
          </draw:text-box>
        </draw:frame>
        <draw:frame draw:style-name="gr6" draw:text-style-name="P7" draw:layer="layout" svg:width="13.095cm" svg:height="0.746cm" svg:x="1.913cm" svg:y="3.527cm">
          <draw:text-box>
            <text:p text:style-name="P2"><text:span text:style-name="T4">The process starts from the </text:span><text:span text:style-name="T6">input image</text:span><text:span text:style-name="T4">, </text:span></text:p>
          </draw:text-box>
        </draw:frame>
        <draw:frame draw:style-name="gr6" draw:text-style-name="P7" draw:layer="layout" svg:width="3.304cm" svg:height="0.746cm" svg:x="1.913cm" svg:y="4.293cm">
          <draw:text-box>
            <text:p text:style-name="P2"><text:span text:style-name="T4">labeled as </text:span></text:p>
          </draw:text-box>
        </draw:frame>
        <draw:frame draw:style-name="gr6" draw:text-style-name="P7" draw:layer="layout" svg:width="0.634cm" svg:height="0.636cm" svg:x="5.215cm" svg:y="4.397cm">
          <draw:text-box>
            <text:p text:style-name="P2"><text:span text:style-name="T18">𝑓</text:span></text:p>
          </draw:text-box>
        </draw:frame>
        <draw:frame draw:style-name="gr14" draw:text-style-name="P12" draw:layer="layout" svg:width="0.465cm" svg:height="0.467cm" svg:x="5.601cm" svg:y="4.296cm">
          <draw:text-box>
            <text:p text:style-name="P2"><text:span text:style-name="T19">0</text:span></text:p>
          </draw:text-box>
        </draw:frame>
        <draw:frame draw:style-name="gr15" draw:text-style-name="P7" draw:layer="layout" svg:width="0.635cm" svg:height="0.708cm" svg:x="1.117cm" svg:y="5.082cm">
          <draw:text-box>
            <text:p text:style-name="P2"><text:span text:style-name="T17">➢</text:span></text:p>
          </draw:text-box>
        </draw:frame>
        <draw:frame draw:style-name="gr15" draw:text-style-name="P7" draw:layer="layout" svg:width="0.635cm" svg:height="0.636cm" svg:x="1.913cm" svg:y="5.159cm">
          <draw:text-box>
            <text:p text:style-name="P2"><text:span text:style-name="T18">𝑓</text:span></text:p>
          </draw:text-box>
        </draw:frame>
        <draw:frame draw:style-name="gr14" draw:text-style-name="P12" draw:layer="layout" svg:width="0.465cm" svg:height="0.467cm" svg:x="2.286cm" svg:y="5.058cm">
          <draw:text-box>
            <text:p text:style-name="P2"><text:span text:style-name="T19">1</text:span></text:p>
          </draw:text-box>
        </draw:frame>
        <draw:frame draw:style-name="gr15" draw:text-style-name="P7" draw:layer="layout" svg:width="0.635cm" svg:height="0.636cm" svg:x="2.582cm" svg:y="5.159cm">
          <draw:text-box>
            <text:p text:style-name="P2"><text:span text:style-name="T18">, 𝑓</text:span></text:p>
          </draw:text-box>
        </draw:frame>
        <draw:frame draw:style-name="gr14" draw:text-style-name="P12" draw:layer="layout" svg:width="0.465cm" svg:height="0.467cm" svg:x="3.205cm" svg:y="5.058cm">
          <draw:text-box>
            <text:p text:style-name="P2"><text:span text:style-name="T19">2</text:span></text:p>
          </draw:text-box>
        </draw:frame>
        <draw:frame draw:style-name="gr15" draw:text-style-name="P7" draw:layer="layout" svg:width="1.509cm" svg:height="0.636cm" svg:x="3.501cm" svg:y="5.159cm">
          <draw:text-box>
            <text:p text:style-name="P2"><text:span text:style-name="T18">, … , 𝑓</text:span></text:p>
          </draw:text-box>
        </draw:frame>
        <draw:frame draw:style-name="gr14" draw:text-style-name="P12" draw:layer="layout" svg:width="0.855cm" svg:height="0.467cm" svg:x="4.945cm" svg:y="5.058cm">
          <draw:text-box>
            <text:p text:style-name="P2"><text:span text:style-name="T19">𝐿−1</text:span></text:p>
          </draw:text-box>
        </draw:frame>
        <draw:frame draw:style-name="gr15" draw:text-style-name="P7" draw:layer="layout" svg:width="8.853cm" svg:height="0.746cm" svg:x="5.842cm" svg:y="5.054cm">
          <draw:text-box>
            <text:p text:style-name="P2"><text:span text:style-name="T4">, represent the intermediate </text:span></text:p>
          </draw:text-box>
        </draw:frame>
        <draw:frame draw:style-name="gr6" draw:text-style-name="P7" draw:layer="layout" svg:width="12.028cm" svg:height="0.746cm" svg:x="1.913cm" svg:y="5.814cm">
          <draw:text-box>
            <text:p text:style-name="P2"><text:span text:style-name="T4">feature maps at each layer of the CNN.</text:span></text:p>
          </draw:text-box>
        </draw:frame>
        <draw:path draw:style-name="gr16" draw:text-style-name="P13" draw:layer="layout" svg:width="1.13cm" svg:height="0.635cm" svg:x="15.291cm" svg:y="0.998cm" svg:viewBox="0 0 1131 636" svg:d="M1106 0l-964 527 26 46 963-527zM135 440l-135 196 236-9z">
          <text:p/>
        </draw:path>
        <draw:frame draw:style-name="gr6" draw:text-style-name="P7" draw:layer="layout" svg:width="17.032cm" svg:height="0.746cm" svg:x="15.736cm" svg:y="0.207cm">
          <draw:text-box>
            <text:p text:style-name="P2"><text:span text:style-name="T4">This is the output of the last convolution + ReLU layer.</text:span></text:p>
          </draw:text-box>
        </draw:frame>
        <draw:frame draw:style-name="gr17" draw:text-style-name="P14" draw:layer="layout" svg:width="15.668cm" svg:height="0.708cm" svg:x="17.19cm" svg:y="1.761cm">
          <draw:text-box>
            <text:p text:style-name="P2"><text:span text:style-name="T20">Backpropagate through fully connected layers: <text:s text:c="4"/></text:span></text:p>
          </draw:text-box>
        </draw:frame>
        <draw:frame draw:style-name="gr18" draw:text-style-name="P14" draw:layer="layout" svg:width="7.767cm" svg:height="0.708cm" svg:x="17.19cm" svg:y="2.473cm">
          <draw:text-box>
            <text:p text:style-name="P2"><text:span text:style-name="T20"><text:s text:c="11"/></text:span><text:span text:style-name="T21">Normal chain rule.</text:span></text:p>
          </draw:text-box>
        </draw:frame>
        <draw:frame draw:style-name="gr18" draw:text-style-name="P14" draw:layer="layout" svg:width="13.922cm" svg:height="0.708cm" svg:x="17.19cm" svg:y="3.193cm">
          <draw:text-box>
            <text:p text:style-name="P2"><text:span text:style-name="T21"><text:s text:c="12"/>No Guided Backprop modification here.</text:span></text:p>
          </draw:text-box>
        </draw:frame>
        <draw:frame draw:style-name="gr18" draw:text-style-name="P14" draw:layer="layout" svg:width="15.835cm" svg:height="0.708cm" svg:x="17.19cm" svg:y="3.913cm">
          <draw:text-box>
            <text:p text:style-name="P2"><text:span text:style-name="T20">Reach the </text:span><text:span text:style-name="T22">final convolution + ReLU layer: </text:span><text:span text:style-name="T21">Now we </text:span></text:p>
          </draw:text-box>
        </draw:frame>
        <draw:frame draw:style-name="gr18" draw:text-style-name="P14" draw:layer="layout" svg:width="10.125cm" svg:height="0.708cm" svg:x="17.19cm" svg:y="4.632cm">
          <draw:text-box>
            <text:p text:style-name="P2"><text:span text:style-name="T21">apply the Guided Backprop rules: </text:span></text:p>
          </draw:text-box>
        </draw:frame>
        <draw:frame draw:style-name="gr18" draw:text-style-name="P14" draw:layer="layout" svg:width="14.55cm" svg:height="0.708cm" svg:x="17.19cm" svg:y="5.36cm">
          <draw:text-box>
            <text:p text:style-name="P2"><text:span text:style-name="T23">Forward ReLU mask and Backward ReLU mask</text:span></text:p>
          </draw:text-box>
        </draw:frame>
        <draw:frame draw:style-name="gr18" draw:text-style-name="P14" draw:layer="layout" svg:width="15.546cm" svg:height="0.708cm" svg:x="17.308cm" svg:y="6.575cm">
          <draw:text-box>
            <text:p text:style-name="P2"><text:span text:style-name="T21">Guided Backprop only modifies the </text:span><text:span text:style-name="T24">ReLU backward </text:span></text:p>
          </draw:text-box>
        </draw:frame>
        <draw:frame draw:style-name="gr18" draw:text-style-name="P14" draw:layer="layout" svg:width="1.42cm" svg:height="0.708cm" svg:x="17.308cm" svg:y="7.295cm">
          <draw:text-box>
            <text:p text:style-name="P2"><text:span text:style-name="T24">rule</text:span><text:span text:style-name="T25">.</text:span></text:p>
          </draw:text-box>
        </draw:frame>
        <draw:frame draw:style-name="gr17" draw:text-style-name="P14" draw:layer="layout" svg:width="13.863cm" svg:height="0.708cm" svg:x="17.308cm" svg:y="8.014cm">
          <draw:text-box>
            <text:p text:style-name="P2"><text:span text:style-name="T21">So, the Guided Backprop logic starts </text:span><text:span text:style-name="T26">when the </text:span></text:p>
          </draw:text-box>
        </draw:frame>
        <draw:frame draw:style-name="gr18" draw:text-style-name="P14" draw:layer="layout" svg:width="15.943cm" svg:height="0.708cm" svg:x="17.308cm" svg:y="8.735cm">
          <draw:text-box>
            <text:p text:style-name="P2"><text:span text:style-name="T26">gradient reaches the first ReLU on the way backwards </text:span></text:p>
          </draw:text-box>
        </draw:frame>
        <draw:frame draw:style-name="gr18" draw:text-style-name="P14" draw:layer="layout" svg:width="13.382cm" svg:height="0.708cm" svg:x="17.308cm" svg:y="9.455cm">
          <draw:text-box>
            <text:p text:style-name="P2"><text:span text:style-name="T27">— </text:span><text:span text:style-name="T21">which is the last convolution + ReLU layer.</text:span></text:p>
          </draw:text-box>
        </draw:frame>
        <draw:path draw:style-name="gr16" draw:text-style-name="P13" draw:layer="layout" svg:width="1.424cm" svg:height="0.212cm" svg:x="14.585cm" svg:y="14.008cm" svg:viewBox="0 0 1425 213" svg:d="M0 80h1249v53h-1249zM1214 0l211 107-211 106z">
          <text:p/>
        </draw:path>
        <draw:polygon draw:style-name="gr19" draw:text-style-name="P15" draw:layer="layout" svg:width="0.916cm" svg:height="0.996cm" svg:x="17.068cm" svg:y="12.75cm" svg:viewBox="0 0 917 997" draw:points="0,0 917,0 917,997 0,997">
          <text:p/>
        </draw:polygon>
        <draw:polygon draw:style-name="gr19" draw:text-style-name="P15" draw:layer="layout" svg:width="0.916cm" svg:height="0.996cm" svg:x="17.068cm" svg:y="13.746cm" svg:viewBox="0 0 917 997" draw:points="0,0 917,0 917,997 0,997">
          <text:p/>
        </draw:polygon>
        <draw:polygon draw:style-name="gr19" draw:text-style-name="P15" draw:layer="layout" svg:width="0.993cm" svg:height="0.996cm" svg:x="17.984cm" svg:y="13.746cm" svg:viewBox="0 0 994 997" draw:points="0,0 994,0 994,997 0,997">
          <text:p/>
        </draw:polygon>
        <draw:polygon draw:style-name="gr19" draw:text-style-name="P15" draw:layer="layout" svg:width="1.044cm" svg:height="0.996cm" svg:x="16.024cm" svg:y="14.743cm" svg:viewBox="0 0 1045 997" draw:points="0,0 1045,0 1045,997 0,997">
          <text:p/>
        </draw:polygon>
        <draw:line draw:style-name="gr20" draw:text-style-name="P5" draw:layer="layout" svg:x1="17.068cm" svg:y1="12.732cm" svg:x2="17.068cm" svg:y2="15.756cm">
          <text:p/>
        </draw:line>
        <draw:line draw:style-name="gr20" draw:text-style-name="P5" draw:layer="layout" svg:x1="17.984cm" svg:y1="12.732cm" svg:x2="17.984cm" svg:y2="15.756cm">
          <text:p/>
        </draw:line>
        <draw:line draw:style-name="gr20" draw:text-style-name="P5" draw:layer="layout" svg:x1="16.007cm" svg:y1="13.746cm" svg:x2="18.994cm" svg:y2="13.746cm">
          <text:p/>
        </draw:line>
        <draw:line draw:style-name="gr20" draw:text-style-name="P5" draw:layer="layout" svg:x1="16.007cm" svg:y1="14.742cm" svg:x2="18.994cm" svg:y2="14.742cm">
          <text:p/>
        </draw:line>
        <draw:line draw:style-name="gr20" draw:text-style-name="P5" draw:layer="layout" svg:x1="16.024cm" svg:y1="12.732cm" svg:x2="16.024cm" svg:y2="15.756cm">
          <text:p/>
        </draw:line>
        <draw:line draw:style-name="gr20" draw:text-style-name="P5" draw:layer="layout" svg:x1="18.976cm" svg:y1="12.732cm" svg:x2="18.976cm" svg:y2="15.756cm">
          <text:p/>
        </draw:line>
        <draw:line draw:style-name="gr20" draw:text-style-name="P5" draw:layer="layout" svg:x1="16.007cm" svg:y1="12.75cm" svg:x2="18.994cm" svg:y2="12.75cm">
          <text:p/>
        </draw:line>
        <draw:line draw:style-name="gr20" draw:text-style-name="P5" draw:layer="layout" svg:x1="16.007cm" svg:y1="15.739cm" svg:x2="18.994cm" svg:y2="15.739cm">
          <text:p/>
        </draw:line>
        <draw:frame draw:style-name="gr6" draw:text-style-name="P7" draw:layer="layout" svg:width="24.22cm" svg:height="0.746cm" svg:x="0.936cm" svg:y="10.964cm">
          <draw:text-box>
            <text:p text:style-name="P2"><text:span text:style-name="T28">Forward ReLU Mask: </text:span><text:span text:style-name="T4">Identify which neurons were active in the Forward Pass</text:span></text:p>
          </draw:text-box>
        </draw:frame>
        <draw:frame draw:style-name="gr21" draw:text-style-name="P16" draw:layer="layout" svg:width="0.494cm" svg:height="0.581cm" svg:x="16.384cm" svg:y="12.888cm">
          <draw:text-box>
            <text:p text:style-name="P2"><text:span text:style-name="T29">1</text:span></text:p>
          </draw:text-box>
        </draw:frame>
        <draw:frame draw:style-name="gr21" draw:text-style-name="P16" draw:layer="layout" svg:width="0.494cm" svg:height="0.581cm" svg:x="17.364cm" svg:y="12.888cm">
          <draw:text-box>
            <text:p text:style-name="P2"><text:span text:style-name="T29">0</text:span></text:p>
          </draw:text-box>
        </draw:frame>
        <draw:frame draw:style-name="gr21" draw:text-style-name="P16" draw:layer="layout" svg:width="0.494cm" svg:height="0.581cm" svg:x="18.319cm" svg:y="12.888cm">
          <draw:text-box>
            <text:p text:style-name="P2"><text:span text:style-name="T29">1</text:span></text:p>
          </draw:text-box>
        </draw:frame>
        <draw:frame draw:style-name="gr21" draw:text-style-name="P16" draw:layer="layout" svg:width="0.494cm" svg:height="0.581cm" svg:x="16.384cm" svg:y="13.884cm">
          <draw:text-box>
            <text:p text:style-name="P2"><text:span text:style-name="T29">1</text:span></text:p>
          </draw:text-box>
        </draw:frame>
        <draw:frame draw:style-name="gr21" draw:text-style-name="P16" draw:layer="layout" svg:width="0.494cm" svg:height="0.581cm" svg:x="17.364cm" svg:y="13.884cm">
          <draw:text-box>
            <text:p text:style-name="P2"><text:span text:style-name="T29">0</text:span></text:p>
          </draw:text-box>
        </draw:frame>
        <draw:frame draw:style-name="gr21" draw:text-style-name="P16" draw:layer="layout" svg:width="0.494cm" svg:height="0.581cm" svg:x="18.319cm" svg:y="13.884cm">
          <draw:text-box>
            <text:p text:style-name="P2"><text:span text:style-name="T29">0</text:span></text:p>
          </draw:text-box>
        </draw:frame>
        <draw:frame draw:style-name="gr21" draw:text-style-name="P16" draw:layer="layout" svg:width="0.494cm" svg:height="0.581cm" svg:x="16.384cm" svg:y="14.881cm">
          <draw:text-box>
            <text:p text:style-name="P2"><text:span text:style-name="T29">0</text:span></text:p>
          </draw:text-box>
        </draw:frame>
        <draw:frame draw:style-name="gr21" draw:text-style-name="P16" draw:layer="layout" svg:width="0.494cm" svg:height="0.581cm" svg:x="17.364cm" svg:y="14.881cm">
          <draw:text-box>
            <text:p text:style-name="P2"><text:span text:style-name="T29">1</text:span></text:p>
          </draw:text-box>
        </draw:frame>
        <draw:polygon draw:style-name="gr8" draw:text-style-name="P5" draw:layer="layout" svg:width="4.357cm" svg:height="1.219cm" svg:x="18.304cm" svg:y="13.555cm" svg:viewBox="0 0 4358 1220" draw:points="0,1220 4358,1220 4358,0 0,0">
          <text:p/>
        </draw:polygon>
        <draw:frame draw:style-name="gr21" draw:text-style-name="P16" draw:layer="layout" svg:width="0.494cm" svg:height="0.581cm" svg:x="18.319cm" svg:y="14.881cm">
          <draw:text-box>
            <text:p text:style-name="P2"><text:span text:style-name="T29">1</text:span></text:p>
          </draw:text-box>
        </draw:frame>
        <draw:frame draw:style-name="gr15" draw:text-style-name="P7" draw:layer="layout" svg:width="0.635cm" svg:height="0.636cm" svg:x="19.336cm" svg:y="13.845cm">
          <draw:text-box>
            <text:p text:style-name="P2"><text:span text:style-name="T30">(𝑓</text:span></text:p>
          </draw:text-box>
        </draw:frame>
        <draw:frame draw:style-name="gr22" draw:text-style-name="P12" draw:layer="layout" svg:width="0.466cm" svg:height="0.467cm" svg:x="19.848cm" svg:y="14.138cm">
          <draw:text-box>
            <text:p text:style-name="P2"><text:span text:style-name="T31">𝑖</text:span></text:p>
          </draw:text-box>
        </draw:frame>
        <draw:frame draw:style-name="gr14" draw:text-style-name="P12" draw:layer="layout" svg:width="0.465cm" svg:height="0.467cm" svg:x="19.984cm" svg:y="13.72cm">
          <draw:text-box>
            <text:p text:style-name="P2"><text:span text:style-name="T31">𝑙</text:span></text:p>
          </draw:text-box>
        </draw:frame>
        <draw:polyline draw:style-name="gr8" draw:text-style-name="P5" draw:layer="layout" svg:width="13.517cm" svg:height="2.548cm" svg:x="20.349cm" svg:y="11.722cm" svg:viewBox="0 0 13518 2549" draw:points="13518,0 0,0 0,2549 13518,2549">
          <text:p/>
        </draw:polyline>
        <draw:frame draw:style-name="gr15" draw:text-style-name="P7" draw:layer="layout" svg:width="1.233cm" svg:height="0.636cm" svg:x="20.369cm" svg:y="13.845cm">
          <draw:text-box>
            <text:p text:style-name="P2"><text:span text:style-name="T30">&gt; 0)</text:span></text:p>
          </draw:text-box>
        </draw:frame>
        <draw:frame draw:style-name="gr10" draw:text-style-name="P10" draw:layer="layout" svg:width="10.924cm" svg:height="0.661cm" svg:x="20.694cm" svg:y="11.907cm">
          <draw:text-box>
            <text:p text:style-name="P2"><text:span text:style-name="T32">:</text:span><text:span text:style-name="T12"> Record of which activation at position </text:span></text:p>
          </draw:text-box>
        </draw:frame>
        <draw:frame draw:style-name="gr10" draw:text-style-name="P10" draw:layer="layout" svg:width="0.562cm" svg:height="0.564cm" svg:x="31.669cm" svg:y="11.999cm">
          <draw:text-box>
            <text:p text:style-name="P2"><text:span text:style-name="T33">𝑖</text:span></text:p>
          </draw:text-box>
        </draw:frame>
        <draw:frame draw:style-name="gr10" draw:text-style-name="P10" draw:layer="layout" svg:width="0.903cm" svg:height="0.661cm" svg:x="31.868cm" svg:y="11.907cm">
          <draw:text-box>
            <text:p text:style-name="P2"><text:span text:style-name="T12"><text:s/>in </text:span></text:p>
          </draw:text-box>
        </draw:frame>
        <draw:frame draw:style-name="gr10" draw:text-style-name="P10" draw:layer="layout" svg:width="1.522cm" svg:height="0.661cm" svg:x="20.694cm" svg:y="12.585cm">
          <draw:text-box>
            <text:p text:style-name="P2"><text:span text:style-name="T12">layer </text:span></text:p>
          </draw:text-box>
        </draw:frame>
        <draw:frame draw:style-name="gr10" draw:text-style-name="P10" draw:layer="layout" svg:width="0.562cm" svg:height="0.564cm" svg:x="22.214cm" svg:y="12.678cm">
          <draw:text-box>
            <text:p text:style-name="P2"><text:span text:style-name="T33">𝑙 </text:span></text:p>
          </draw:text-box>
        </draw:frame>
        <draw:frame draw:style-name="gr10" draw:text-style-name="P10" draw:layer="layout" svg:width="9.899cm" svg:height="0.661cm" svg:x="22.532cm" svg:y="12.585cm">
          <draw:text-box>
            <text:p text:style-name="P2"><text:span text:style-name="T12">were active (positive) in the forward </text:span></text:p>
          </draw:text-box>
        </draw:frame>
        <draw:polygon draw:style-name="gr8" draw:text-style-name="P5" draw:layer="layout" svg:width="9.495cm" svg:height="2.477cm" svg:x="10.333cm" svg:y="15.396cm" svg:viewBox="0 0 9496 2478" draw:points="0,2478 9496,2478 9496,0 0,0">
          <text:p/>
        </draw:polygon>
        <draw:frame draw:style-name="gr10" draw:text-style-name="P10" draw:layer="layout" svg:width="1.443cm" svg:height="0.661cm" svg:x="20.694cm" svg:y="13.263cm">
          <draw:text-box>
            <text:p text:style-name="P2"><text:span text:style-name="T12">pass.</text:span></text:p>
          </draw:text-box>
        </draw:frame>
        <draw:frame draw:style-name="gr6" draw:text-style-name="P7" draw:layer="layout" svg:width="3.56cm" svg:height="0.636cm" svg:x="10.738cm" svg:y="16.543cm">
          <draw:text-box>
            <text:p text:style-name="P2"><text:span text:style-name="T18">𝐷𝑒𝑟𝑖𝑣𝑎𝑡𝑖𝑣𝑒 𝑓</text:span></text:p>
          </draw:text-box>
        </draw:frame>
        <draw:path draw:style-name="gr23" draw:text-style-name="P17" draw:layer="layout" svg:width="0.774cm" svg:height="0.588cm" svg:x="14.59cm" svg:y="16.56cm" svg:viewBox="0 0 775 589" svg:d="M587 0c61 16 107 50 139 103 33 53 49 118 49 192 0 75-16 139-48 192-33 52-79 86-140 102l-7-24c48-15 83-47 106-94 24-47 35-106 35-179 0-70-11-129-34-175s-59-77-108-93zM187 0l9 24c-49 16-84 47-108 93-23 46-35 105-35 175 0 73 12 132 35 179 24 47 59 79 107 94l-8 24c-60-16-107-50-139-102-32-53-48-117-48-192 0-74 16-139 48-192 33-53 79-87 139-103z">
          <text:p/>
        </draw:path>
        <draw:frame draw:style-name="gr14" draw:text-style-name="P12" draw:layer="layout" svg:width="0.465cm" svg:height="0.467cm" svg:x="14.342cm" svg:y="16.442cm">
          <draw:text-box>
            <text:p text:style-name="P2"><text:span text:style-name="T19">′</text:span></text:p>
          </draw:text-box>
        </draw:frame>
        <draw:frame draw:style-name="gr6" draw:text-style-name="P7" draw:layer="layout" svg:width="0.634cm" svg:height="0.636cm" svg:x="14.799cm" svg:y="16.543cm">
          <draw:text-box>
            <text:p text:style-name="P2"><text:span text:style-name="T18">𝑥</text:span></text:p>
          </draw:text-box>
        </draw:frame>
        <draw:frame draw:style-name="gr6" draw:text-style-name="P7" draw:layer="layout" svg:width="0.634cm" svg:height="0.636cm" svg:x="15.595cm" svg:y="16.543cm">
          <draw:text-box>
            <text:p text:style-name="P2"><text:span text:style-name="T18">=</text:span></text:p>
          </draw:text-box>
        </draw:frame>
        <draw:frame draw:style-name="gr6" draw:text-style-name="P7" draw:layer="layout" svg:width="3.068cm" svg:height="0.636cm" svg:x="16.251cm" svg:y="16.12cm">
          <draw:text-box>
            <text:p text:style-name="P2"><text:span text:style-name="T18">0 𝑓𝑜𝑟 𝑥 ≤ 0</text:span></text:p>
          </draw:text-box>
        </draw:frame>
        <draw:frame draw:style-name="gr6" draw:text-style-name="P7" draw:layer="layout" svg:width="3.068cm" svg:height="0.636cm" svg:x="16.251cm" svg:y="16.908cm">
          <draw:text-box>
            <text:p text:style-name="P2"><text:span text:style-name="T18">1 𝑓𝑜𝑟 𝑥 &gt; 0</text:span></text:p>
          </draw:text-box>
        </draw:frame>
        <draw:frame draw:style-name="gr10" draw:text-style-name="P10" draw:layer="layout" svg:width="13.075cm" svg:height="0.661cm" svg:x="19.6cm" svg:y="15.114cm">
          <draw:text-box>
            <text:p text:style-name="P2"><text:span text:style-name="T12">During backpropagation, ReLU uses this mask </text:span></text:p>
          </draw:text-box>
        </draw:frame>
        <draw:frame draw:style-name="gr10" draw:text-style-name="P10" draw:layer="layout" svg:width="7.456cm" svg:height="0.661cm" svg:x="19.6cm" svg:y="15.792cm">
          <draw:text-box>
            <text:p text:style-name="P2"><text:span text:style-name="T12">to block or allow gradients.</text:span></text:p>
          </draw:text-box>
        </draw:frame>
        <draw:frame draw:style-name="gr24" draw:text-style-name="P18" draw:layer="layout" svg:width="31.139cm" svg:height="0.496cm" svg:x="0.513cm" svg:y="18.078cm">
          <draw:text-box>
            <text:p text:style-name="P2"><text:span text:style-name="T34">Springenberg, J. T., Dosovitskiy, A., Brox, T., &amp; Riedmiller, M. (2014). Striving for simplicity: The all convolutional net.</text:span><text:span text:style-name="T35"> arXiv preprint arXiv:1412.6806</text:span><text:span text:style-name="T34">.</text:span></text:p>
          </draw:text-box>
        </draw:frame>
        <draw:frame draw:style-name="gr4" draw:text-style-name="P5" draw:layer="layout" svg:width="13.856cm" svg:height="3.983cm" svg:x="1.559cm" svg:y="6.726cm">
          <draw:image xlink:href="Pictures/1000000000000443000001390AA99E59.jpg" xlink:type="simple" xlink:show="embed" xlink:actuate="onLoad" draw:mime-type="image/jpeg">
            <text:p/>
          </draw:image>
        </draw:frame>
        <draw:frame draw:style-name="gr11" draw:text-style-name="P10" draw:layer="layout" svg:width="5.835cm" svg:height="0.661cm" svg:x="14.75cm" svg:y="11.955cm">
          <draw:text-box>
            <text:p text:style-name="P2"><text:span text:style-name="T32">Forward ReLU Mask</text:span></text:p>
          </draw:text-box>
        </draw:frame>
        <draw:frame draw:style-name="gr10" draw:text-style-name="P10" draw:layer="layout" svg:width="3.684cm" svg:height="0.661cm" svg:x="6.255cm" svg:y="16.019cm">
          <draw:text-box>
            <text:p text:style-name="P2"><text:span text:style-name="T12">Feature map </text:span></text:p>
          </draw:text-box>
        </draw:frame>
        <draw:frame draw:style-name="gr4" draw:text-style-name="P5" draw:layer="layout" svg:width="13.263cm" svg:height="3.546cm" svg:x="1.23cm" svg:y="12.427cm">
          <draw:image xlink:href="Pictures/1000000000000295000000B1E9A43AEF.jpg" xlink:type="simple" xlink:show="embed" xlink:actuate="onLoad" draw:mime-type="image/jpeg">
            <text:p/>
          </draw:image>
        </draw:frame>
        <draw:polygon draw:style-name="gr8" draw:text-style-name="P5" draw:layer="layout" svg:width="2.379cm" svg:height="0.817cm" svg:x="9.144cm" svg:y="12.471cm" svg:viewBox="0 0 2380 818" draw:points="0,818 2380,818 2380,0 0,0">
          <text:p/>
        </draw:polygon>
        <draw:frame draw:style-name="gr11" draw:text-style-name="P10" draw:layer="layout" svg:width="4.359cm" svg:height="0.661cm" svg:x="5.815cm" svg:y="16.696cm">
          <draw:text-box>
            <text:p text:style-name="P2"><text:span text:style-name="T12">after Conv layer</text:span></text:p>
          </draw:text-box>
        </draw:frame>
        <draw:path draw:style-name="gr23" draw:text-style-name="P17" draw:layer="layout" svg:width="0.978cm" svg:height="0.423cm" svg:x="10.271cm" svg:y="12.683cm" svg:viewBox="0 0 979 424" svg:d="M842 0c44 11 77 36 101 74s36 84 36 138c0 55-12 100-36 139-23 37-57 62-101 73l-5-17c35-11 60-34 77-68 17-33 25-76 25-130 0-50-8-92-25-125s-43-56-78-67zM135 0l6 17c-34 11-60 34-77 67s-25 75-25 125c0 54 8 97 25 130 17 34 43 57 77 68l-6 17c-43-11-76-36-100-73-23-39-35-84-35-139 0-54 12-100 35-138 24-38 57-63 100-74z">
          <text:p/>
        </draw:path>
        <draw:line draw:style-name="gr25" draw:text-style-name="P5" draw:layer="layout" svg:x1="16.409cm" svg:y1="1.62cm" svg:x2="16.409cm" svg:y2="10.089cm">
          <text:p/>
        </draw:line>
        <draw:frame draw:style-name="gr26" draw:text-style-name="P19" draw:layer="layout" svg:width="1.618cm" svg:height="0.459cm" svg:x="9.403cm" svg:y="12.673cm">
          <draw:text-box>
            <text:p text:style-name="P2"><text:span text:style-name="T36">max 0, 𝑥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66cm" svg:height="19.05cm" svg:x="0cm" svg:y="0cm" svg:viewBox="0 0 33867 19051" draw:points="0,19051 33867,19051 33867,0 0,0">
          <text:p/>
        </draw:polygon>
        <draw:polygon draw:style-name="gr8" draw:text-style-name="P5" draw:layer="layout" svg:width="17.327cm" svg:height="7.709cm" svg:x="0.956cm" svg:y="8.64cm" svg:viewBox="0 0 17328 7710" draw:points="0,7710 17328,7710 17328,0 0,0">
          <text:p/>
        </draw:polygon>
        <draw:frame draw:style-name="gr6" draw:text-style-name="P7" draw:layer="layout" svg:width="0.634cm" svg:height="0.708cm" svg:x="1.314cm" svg:y="8.869cm">
          <draw:text-box>
            <text:p text:style-name="P2"><text:span text:style-name="T17">➢</text:span></text:p>
          </draw:text-box>
        </draw:frame>
        <draw:frame draw:style-name="gr6" draw:text-style-name="P7" draw:layer="layout" svg:width="15.673cm" svg:height="0.746cm" svg:x="2.11cm" svg:y="8.841cm">
          <draw:text-box>
            <text:p text:style-name="P2"><text:span text:style-name="T4">During backpropagation, the algorithm calculates </text:span></text:p>
          </draw:text-box>
        </draw:frame>
        <draw:frame draw:style-name="gr6" draw:text-style-name="P7" draw:layer="layout" svg:width="7.977cm" svg:height="0.746cm" svg:x="2.11cm" svg:y="9.603cm">
          <draw:text-box>
            <text:p text:style-name="P2"><text:span text:style-name="T4">the gradients of the error </text:span></text:p>
          </draw:text-box>
        </draw:frame>
        <draw:frame draw:style-name="gr10" draw:text-style-name="P10" draw:layer="layout" svg:width="7.794cm" svg:height="0.661cm" svg:x="10.086cm" svg:y="9.671cm">
          <draw:text-box>
            <text:p text:style-name="P2"><text:span text:style-name="T12">(Zebra score with respect to </text:span></text:p>
          </draw:text-box>
        </draw:frame>
        <draw:frame draw:style-name="gr10" draw:text-style-name="P10" draw:layer="layout" svg:width="6.713cm" svg:height="0.661cm" svg:x="2.11cm" svg:y="10.433cm">
          <draw:text-box>
            <text:p text:style-name="P2"><text:span text:style-name="T12">EACH of the 3×3 values)</text:span></text:p>
          </draw:text-box>
        </draw:frame>
        <draw:polygon draw:style-name="gr23" draw:text-style-name="P17" draw:layer="layout" svg:width="1.613cm" svg:height="0.043cm" svg:x="2.109cm" svg:y="11.71cm" svg:viewBox="0 0 1614 44" draw:points="0,0 1614,0 1614,44 0,44">
          <text:p/>
        </draw:polygon>
        <draw:frame draw:style-name="gr6" draw:text-style-name="P7" draw:layer="layout" svg:width="4.929cm" svg:height="0.746cm" svg:x="8.842cm" svg:y="10.365cm">
          <draw:text-box>
            <text:p text:style-name="P2"><text:span text:style-name="T4"><text:s/>in the network </text:span></text:p>
          </draw:text-box>
        </draw:frame>
        <draw:frame draw:style-name="gr14" draw:text-style-name="P12" draw:layer="layout" svg:width="1.464cm" svg:height="0.467cm" svg:x="2.11cm" svg:y="11.181cm">
          <draw:text-box>
            <text:p text:style-name="P2"><text:span text:style-name="T19">𝜕𝐸𝑟𝑟𝑜𝑟</text:span></text:p>
          </draw:text-box>
        </draw:frame>
        <draw:frame draw:style-name="gr14" draw:text-style-name="P12" draw:layer="layout" svg:width="0.486cm" svg:height="0.467cm" svg:x="2.563cm" svg:y="11.871cm">
          <draw:text-box>
            <text:p text:style-name="P2"><text:span text:style-name="T19">𝜕𝑧</text:span></text:p>
          </draw:text-box>
        </draw:frame>
        <draw:frame draw:style-name="gr27" draw:text-style-name="P20" draw:layer="layout" svg:width="0.381cm" svg:height="0.382cm" svg:x="3.105cm" svg:y="12.038cm">
          <draw:text-box>
            <text:p text:style-name="P2"><text:span text:style-name="T37">𝑖</text:span></text:p>
          </draw:text-box>
        </draw:frame>
        <draw:polygon draw:style-name="gr23" draw:text-style-name="P17" draw:layer="layout" svg:width="1.698cm" svg:height="0.043cm" svg:x="4.382cm" svg:y="11.71cm" svg:viewBox="0 0 1699 44" draw:points="0,0 1699,0 1699,44 0,44">
          <text:p/>
        </draw:polygon>
        <draw:frame draw:style-name="gr6" draw:text-style-name="P7" draw:layer="layout" svg:width="0.634cm" svg:height="0.636cm" svg:x="3.824cm" svg:y="11.422cm">
          <draw:text-box>
            <text:p text:style-name="P2"><text:span text:style-name="T18">~</text:span></text:p>
          </draw:text-box>
        </draw:frame>
        <draw:frame draw:style-name="gr14" draw:text-style-name="P12" draw:layer="layout" svg:width="0.476cm" svg:height="0.467cm" svg:x="4.383cm" svg:y="11.181cm">
          <draw:text-box>
            <text:p text:style-name="P2"><text:span text:style-name="T19">𝜕𝑠</text:span></text:p>
          </draw:text-box>
        </draw:frame>
        <draw:frame draw:style-name="gr28" draw:text-style-name="P20" draw:layer="layout" svg:width="0.974cm" svg:height="0.382cm" svg:x="4.908cm" svg:y="11.345cm">
          <draw:text-box>
            <text:p text:style-name="P2"><text:span text:style-name="T37">𝑧𝑒𝑏𝑟𝑎</text:span></text:p>
          </draw:text-box>
        </draw:frame>
        <draw:frame draw:style-name="gr14" draw:text-style-name="P12" draw:layer="layout" svg:width="0.486cm" svg:height="0.467cm" svg:x="4.879cm" svg:y="11.871cm">
          <draw:text-box>
            <text:p text:style-name="P2"><text:span text:style-name="T19">𝜕𝑧</text:span></text:p>
          </draw:text-box>
        </draw:frame>
        <draw:frame draw:style-name="gr27" draw:text-style-name="P20" draw:layer="layout" svg:width="0.381cm" svg:height="0.382cm" svg:x="5.425cm" svg:y="12.038cm">
          <draw:text-box>
            <text:p text:style-name="P2"><text:span text:style-name="T37">𝑖</text:span></text:p>
          </draw:text-box>
        </draw:frame>
        <draw:frame draw:style-name="gr6" draw:text-style-name="P7" draw:layer="layout" svg:width="2.948cm" svg:height="0.746cm" svg:x="6.086cm" svg:y="11.318cm">
          <draw:text-box>
            <text:p text:style-name="P2"><text:span text:style-name="T4">(example)</text:span></text:p>
          </draw:text-box>
        </draw:frame>
        <draw:frame draw:style-name="gr15" draw:text-style-name="P7" draw:layer="layout" svg:width="12.664cm" svg:height="0.746cm" svg:x="18.446cm" svg:y="1.513cm">
          <draw:text-box>
            <text:p text:style-name="P2"><text:span text:style-name="T4">During backpropagation, ReLU uses the </text:span></text:p>
          </draw:text-box>
        </draw:frame>
        <draw:frame draw:style-name="gr6" draw:text-style-name="P7" draw:layer="layout" svg:width="13.844cm" svg:height="0.746cm" svg:x="18.446cm" svg:y="2.277cm">
          <draw:text-box>
            <text:p text:style-name="P2"><text:span text:style-name="T28">forward ReLU mask</text:span><text:span text:style-name="T4"> to allow gradients only </text:span></text:p>
          </draw:text-box>
        </draw:frame>
        <draw:frame draw:style-name="gr6" draw:text-style-name="P7" draw:layer="layout" svg:width="15.152cm" svg:height="0.746cm" svg:x="18.446cm" svg:y="3.039cm">
          <draw:text-box>
            <text:p text:style-name="P2"><text:span text:style-name="T4">through neurons that were active in the forward </text:span></text:p>
          </draw:text-box>
        </draw:frame>
        <draw:frame draw:style-name="gr6" draw:text-style-name="P7" draw:layer="layout" svg:width="13.185cm" svg:height="0.746cm" svg:x="18.446cm" svg:y="3.801cm">
          <draw:text-box>
            <text:p text:style-name="P2"><text:span text:style-name="T4">pass. ReLU </text:span><text:span text:style-name="T6">sets the gradients to zero </text:span><text:span text:style-name="T4">at </text:span></text:p>
          </draw:text-box>
        </draw:frame>
        <draw:frame draw:style-name="gr4" draw:text-style-name="P5" draw:layer="layout" svg:width="4.76cm" svg:height="4.803cm" svg:x="13.209cm" svg:y="13.767cm">
          <draw:image xlink:href="Pictures/10000000000000D9000000DBC5B189A0.jpg" xlink:type="simple" xlink:show="embed" xlink:actuate="onLoad" draw:mime-type="image/jpeg">
            <text:p/>
          </draw:image>
        </draw:frame>
        <draw:polyline draw:style-name="gr8" draw:text-style-name="P5" draw:layer="layout" svg:width="15.9cm" svg:height="2.668cm" svg:x="17.966cm" svg:y="14.037cm" svg:viewBox="0 0 15901 2669" draw:points="15901,0 0,0 0,2669 15901,2669">
          <text:p/>
        </draw:polyline>
        <draw:frame draw:style-name="gr6" draw:text-style-name="P7" draw:layer="layout" svg:width="5.59cm" svg:height="0.746cm" svg:x="18.446cm" svg:y="4.563cm">
          <draw:text-box>
            <text:p text:style-name="P2"><text:span text:style-name="T4">inactive locations.</text:span></text:p>
          </draw:text-box>
        </draw:frame>
        <draw:frame draw:style-name="gr6" draw:text-style-name="P7" draw:layer="layout" svg:width="0.634cm" svg:height="0.636cm" svg:x="18.468cm" svg:y="14.347cm">
          <draw:text-box>
            <text:p text:style-name="P2"><text:span text:style-name="T18">𝑹</text:span></text:p>
          </draw:text-box>
        </draw:frame>
        <draw:frame draw:style-name="gr14" draw:text-style-name="P12" draw:layer="layout" svg:width="0.465cm" svg:height="0.467cm" svg:x="18.913cm" svg:y="14.636cm">
          <draw:text-box>
            <text:p text:style-name="P2"><text:span text:style-name="T19">𝒊</text:span></text:p>
          </draw:text-box>
        </draw:frame>
        <draw:frame draw:style-name="gr14" draw:text-style-name="P12" draw:layer="layout" svg:width="0.465cm" svg:height="0.467cm" svg:x="18.913cm" svg:y="14.225cm">
          <draw:text-box>
            <text:p text:style-name="P2"><text:span text:style-name="T19">𝒍</text:span></text:p>
          </draw:text-box>
        </draw:frame>
        <draw:path draw:style-name="gr23" draw:text-style-name="P17" draw:layer="layout" svg:width="2.223cm" svg:height="0.767cm" svg:x="19.99cm" svg:y="14.273cm" svg:viewBox="0 0 2224 768" svg:d="M2022 0c65 17 115 61 150 132s52 155 52 252-17 181-52 252c-35 72-85 115-150 132l-7-25c50-19 88-60 113-124 26-63 39-141 39-235s-13-172-39-235c-25-64-63-105-113-123zM202 0l8 26c-50 18-88 59-114 123-26 63-38 141-38 235s12 172 38 235c26 64 64 105 114 124l-8 25c-64-17-114-60-149-132-35-71-53-155-53-252s18-181 53-252 85-115 149-132z">
          <text:p/>
        </draw:path>
        <draw:frame draw:style-name="gr6" draw:text-style-name="P7" draw:layer="layout" svg:width="0.974cm" svg:height="0.636cm" svg:x="19.281cm" svg:y="14.347cm">
          <draw:text-box>
            <text:p text:style-name="P2"><text:span text:style-name="T18">= 𝒇</text:span></text:p>
          </draw:text-box>
        </draw:frame>
        <draw:frame draw:style-name="gr14" draw:text-style-name="P12" draw:layer="layout" svg:width="0.465cm" svg:height="0.467cm" svg:x="20.582cm" svg:y="14.636cm">
          <draw:text-box>
            <text:p text:style-name="P2"><text:span text:style-name="T19">𝒊</text:span></text:p>
          </draw:text-box>
        </draw:frame>
        <draw:frame draw:style-name="gr14" draw:text-style-name="P12" draw:layer="layout" svg:width="0.465cm" svg:height="0.467cm" svg:x="20.582cm" svg:y="14.225cm">
          <draw:text-box>
            <text:p text:style-name="P2"><text:span text:style-name="T19">𝒍</text:span></text:p>
          </draw:text-box>
        </draw:frame>
        <draw:frame draw:style-name="gr6" draw:text-style-name="P7" draw:layer="layout" svg:width="2.436cm" svg:height="0.636cm" svg:x="20.954cm" svg:y="14.347cm">
          <draw:text-box>
            <text:p text:style-name="P2"><text:span text:style-name="T18">&gt; 𝟎 <text:s text:c="2"/>∙ <text:s text:c="2"/>𝑹</text:span></text:p>
          </draw:text-box>
        </draw:frame>
        <draw:frame draw:style-name="gr14" draw:text-style-name="P12" draw:layer="layout" svg:width="0.465cm" svg:height="0.467cm" svg:x="23.46cm" svg:y="14.636cm">
          <draw:text-box>
            <text:p text:style-name="P2"><text:span text:style-name="T19">𝒊</text:span></text:p>
          </draw:text-box>
        </draw:frame>
        <draw:frame draw:style-name="gr14" draw:text-style-name="P12" draw:layer="layout" svg:width="0.801cm" svg:height="0.467cm" svg:x="23.46cm" svg:y="14.225cm">
          <draw:text-box>
            <text:p text:style-name="P2"><text:span text:style-name="T19">𝒍+𝟏</text:span></text:p>
          </draw:text-box>
        </draw:frame>
        <draw:frame draw:style-name="gr6" draw:text-style-name="P7" draw:layer="layout" svg:width="0.634cm" svg:height="0.636cm" svg:x="18.468cm" svg:y="15.157cm">
          <draw:text-box>
            <text:p text:style-name="P2"><text:span text:style-name="T18">→</text:span></text:p>
          </draw:text-box>
        </draw:frame>
        <draw:frame draw:style-name="gr6" draw:text-style-name="P7" draw:layer="layout" svg:width="14.277cm" svg:height="0.746cm" svg:x="19.179cm" svg:y="15.052cm">
          <draw:text-box>
            <text:p text:style-name="P2"><text:span text:style-name="T5">standard way backpropagation flows through </text:span></text:p>
          </draw:text-box>
        </draw:frame>
        <draw:frame draw:style-name="gr4" draw:text-style-name="P5" draw:layer="layout" svg:width="14.515cm" svg:height="5.541cm" svg:x="18.418cm" svg:y="6.01cm">
          <draw:image xlink:href="Pictures/1000000100000477000001B4F96137A8.png" xlink:type="simple" xlink:show="embed" xlink:actuate="onLoad" draw:mime-type="image/png">
            <text:p/>
          </draw:image>
        </draw:frame>
        <draw:frame draw:style-name="gr4" draw:text-style-name="P5" draw:layer="layout" svg:width="3.621cm" svg:height="3.5cm" svg:x="1.834cm" svg:y="5.311cm">
          <draw:image xlink:href="Pictures/100000010000011D000001133F646627.png" xlink:type="simple" xlink:show="embed" xlink:actuate="onLoad" draw:mime-type="image/png">
            <text:p/>
          </draw:image>
        </draw:frame>
        <draw:frame draw:style-name="gr4" draw:text-style-name="P5" draw:layer="layout" svg:width="4.572cm" svg:height="4.243cm" svg:x="1.651cm" svg:y="12.541cm">
          <draw:image xlink:href="Pictures/10000001000001680000014E382FE8B1.png" xlink:type="simple" xlink:show="embed" xlink:actuate="onLoad" draw:mime-type="image/png">
            <text:p/>
          </draw:image>
        </draw:frame>
        <draw:polygon draw:style-name="gr8" draw:text-style-name="P5" draw:layer="layout" svg:width="17.242cm" svg:height="5.144cm" svg:x="0.804cm" svg:y="0.376cm" svg:viewBox="0 0 17243 5145" draw:points="0,5145 17243,5145 17243,0 0,0">
          <text:p/>
        </draw:polygon>
        <draw:frame draw:style-name="gr6" draw:text-style-name="P7" draw:layer="layout" svg:width="1.666cm" svg:height="0.746cm" svg:x="18.468cm" svg:y="15.806cm">
          <draw:text-box>
            <text:p text:style-name="P2"><text:span text:style-name="T5">ReLU</text:span></text:p>
          </draw:text-box>
        </draw:frame>
        <draw:frame draw:style-name="gr6" draw:text-style-name="P7" draw:layer="layout" svg:width="4.358cm" svg:height="0.746cm" svg:x="1.186cm" svg:y="0.581cm">
          <draw:text-box>
            <text:p text:style-name="P2"><text:span text:style-name="T6">Forward Pass</text:span></text:p>
          </draw:text-box>
        </draw:frame>
        <draw:frame draw:style-name="gr6" draw:text-style-name="P7" draw:layer="layout" svg:width="0.634cm" svg:height="0.708cm" svg:x="1.186cm" svg:y="1.362cm">
          <draw:text-box>
            <text:p text:style-name="P2"><text:span text:style-name="T17">➢</text:span></text:p>
          </draw:text-box>
        </draw:frame>
        <draw:frame draw:style-name="gr6" draw:text-style-name="P7" draw:layer="layout" svg:width="12.677cm" svg:height="0.746cm" svg:x="1.982cm" svg:y="1.335cm">
          <draw:text-box>
            <text:p text:style-name="P2"><text:span text:style-name="T4">The convolutional layer produces values </text:span></text:p>
          </draw:text-box>
        </draw:frame>
        <draw:frame draw:style-name="gr6" draw:text-style-name="P7" draw:layer="layout" svg:width="0.634cm" svg:height="0.636cm" svg:x="14.667cm" svg:y="1.439cm">
          <draw:text-box>
            <text:p text:style-name="P2"><text:span text:style-name="T18">𝑧</text:span></text:p>
          </draw:text-box>
        </draw:frame>
        <draw:frame draw:style-name="gr14" draw:text-style-name="P12" draw:layer="layout" svg:width="0.465cm" svg:height="0.467cm" svg:x="14.946cm" svg:y="1.702cm">
          <draw:text-box>
            <text:p text:style-name="P2"><text:span text:style-name="T19">1</text:span></text:p>
          </draw:text-box>
        </draw:frame>
        <draw:frame draw:style-name="gr6" draw:text-style-name="P7" draw:layer="layout" svg:width="0.634cm" svg:height="0.636cm" svg:x="15.242cm" svg:y="1.439cm">
          <draw:text-box>
            <text:p text:style-name="P2"><text:span text:style-name="T18">, 𝑧</text:span></text:p>
          </draw:text-box>
        </draw:frame>
        <draw:frame draw:style-name="gr14" draw:text-style-name="P12" draw:layer="layout" svg:width="0.465cm" svg:height="0.467cm" svg:x="15.772cm" svg:y="1.702cm">
          <draw:text-box>
            <text:p text:style-name="P2"><text:span text:style-name="T19">2</text:span></text:p>
          </draw:text-box>
        </draw:frame>
        <draw:frame draw:style-name="gr6" draw:text-style-name="P7" draw:layer="layout" svg:width="1.196cm" svg:height="0.636cm" svg:x="16.068cm" svg:y="1.439cm">
          <draw:text-box>
            <text:p text:style-name="P2"><text:span text:style-name="T18">, … 𝑧</text:span></text:p>
          </draw:text-box>
        </draw:frame>
        <draw:frame draw:style-name="gr14" draw:text-style-name="P12" draw:layer="layout" svg:width="0.465cm" svg:height="0.467cm" svg:x="17.181cm" svg:y="1.702cm">
          <draw:text-box>
            <text:p text:style-name="P2"><text:span text:style-name="T19">9</text:span></text:p>
          </draw:text-box>
        </draw:frame>
        <draw:frame draw:style-name="gr6" draw:text-style-name="P7" draw:layer="layout" svg:width="0.634cm" svg:height="0.746cm" svg:x="17.461cm" svg:y="1.335cm">
          <draw:text-box>
            <text:p text:style-name="P2"><text:span text:style-name="T4">.</text:span></text:p>
          </draw:text-box>
        </draw:frame>
        <draw:frame draw:style-name="gr6" draw:text-style-name="P7" draw:layer="layout" svg:width="0.634cm" svg:height="0.708cm" svg:x="1.186cm" svg:y="2.124cm">
          <draw:text-box>
            <text:p text:style-name="P2"><text:span text:style-name="T17">➢</text:span></text:p>
          </draw:text-box>
        </draw:frame>
        <draw:frame draw:style-name="gr6" draw:text-style-name="P7" draw:layer="layout" svg:width="7.266cm" svg:height="0.746cm" svg:x="1.982cm" svg:y="2.097cm">
          <draw:text-box>
            <text:p text:style-name="P2"><text:span text:style-name="T4">ReLU transforms them:</text:span></text:p>
          </draw:text-box>
        </draw:frame>
        <draw:frame draw:style-name="gr15" draw:text-style-name="P7" draw:layer="layout" svg:width="0.635cm" svg:height="0.636cm" svg:x="7.402cm" svg:y="2.962cm">
          <draw:text-box>
            <text:p text:style-name="P2"><text:span text:style-name="T18">𝑧</text:span></text:p>
          </draw:text-box>
        </draw:frame>
        <draw:frame draw:style-name="gr14" draw:text-style-name="P12" draw:layer="layout" svg:width="0.465cm" svg:height="0.467cm" svg:x="7.694cm" svg:y="3.227cm">
          <draw:text-box>
            <text:p text:style-name="P2"><text:span text:style-name="T19">𝑖</text:span></text:p>
          </draw:text-box>
        </draw:frame>
        <draw:frame draw:style-name="gr15" draw:text-style-name="P7" draw:layer="layout" svg:width="2.954cm" svg:height="0.636cm" svg:x="8.079cm" svg:y="2.962cm">
          <draw:text-box>
            <text:p text:style-name="P2"><text:span text:style-name="T18">= max(0, 𝑧</text:span></text:p>
          </draw:text-box>
        </draw:frame>
        <draw:frame draw:style-name="gr14" draw:text-style-name="P12" draw:layer="layout" svg:width="0.465cm" svg:height="0.467cm" svg:x="11.025cm" svg:y="3.227cm">
          <draw:text-box>
            <text:p text:style-name="P2"><text:span text:style-name="T19">𝑖</text:span></text:p>
          </draw:text-box>
        </draw:frame>
        <draw:frame draw:style-name="gr15" draw:text-style-name="P7" draw:layer="layout" svg:width="0.635cm" svg:height="0.636cm" svg:x="11.233cm" svg:y="2.962cm">
          <draw:text-box>
            <text:p text:style-name="P2"><text:span text:style-name="T18">)</text:span></text:p>
          </draw:text-box>
        </draw:frame>
        <draw:frame draw:style-name="gr6" draw:text-style-name="P7" draw:layer="layout" svg:width="0.634cm" svg:height="0.708cm" svg:x="1.186cm" svg:y="3.649cm">
          <draw:text-box>
            <text:p text:style-name="P2"><text:span text:style-name="T17">➢</text:span></text:p>
          </draw:text-box>
        </draw:frame>
        <draw:frame draw:style-name="gr6" draw:text-style-name="P7" draw:layer="layout" svg:width="12.117cm" svg:height="0.746cm" svg:x="1.982cm" svg:y="3.622cm">
          <draw:text-box>
            <text:p text:style-name="P2"><text:span text:style-name="T4">Only positive activations pass through.</text:span></text:p>
          </draw:text-box>
        </draw:frame>
        <draw:frame draw:style-name="gr6" draw:text-style-name="P7" draw:layer="layout" svg:width="0.674cm" svg:height="0.636cm" svg:x="1.186cm" svg:y="4.488cm">
          <draw:text-box>
            <text:p text:style-name="P2"><text:span text:style-name="T18">→ </text:span></text:p>
          </draw:text-box>
        </draw:frame>
        <draw:frame draw:style-name="gr6" draw:text-style-name="P7" draw:layer="layout" svg:width="6.136cm" svg:height="0.746cm" svg:x="1.859cm" svg:y="4.384cm">
          <draw:text-box>
            <text:p text:style-name="P2"><text:span text:style-name="T4">This corresponds to</text:span></text:p>
          </draw:text-box>
        </draw:frame>
        <draw:frame draw:style-name="gr21" draw:text-style-name="P16" draw:layer="layout" svg:width="3.628cm" svg:height="0.581cm" svg:x="18.881cm" svg:y="11.917cm">
          <draw:text-box>
            <text:p text:style-name="P2"><text:span text:style-name="T38">Forward ReLU </text:span></text:p>
          </draw:text-box>
        </draw:frame>
        <draw:frame draw:style-name="gr29" draw:text-style-name="P16" draw:layer="layout" svg:width="1.31cm" svg:height="0.581cm" svg:x="19.952cm" svg:y="12.509cm">
          <draw:text-box>
            <text:p text:style-name="P2"><text:span text:style-name="T38">Mask</text:span></text:p>
          </draw:text-box>
        </draw:frame>
        <draw:frame draw:style-name="gr21" draw:text-style-name="P16" draw:layer="layout" svg:width="5.014cm" svg:height="0.581cm" svg:x="23.73cm" svg:y="11.89cm">
          <draw:text-box>
            <text:p text:style-name="P2"><text:span text:style-name="T38">Raw Gradients from </text:span></text:p>
          </draw:text-box>
        </draw:frame>
        <draw:frame draw:style-name="gr21" draw:text-style-name="P16" draw:layer="layout" svg:width="4.113cm" svg:height="0.581cm" svg:x="24.098cm" svg:y="12.483cm">
          <draw:text-box>
            <text:p text:style-name="P2"><text:span text:style-name="T38">Backpropagation</text:span></text:p>
          </draw:text-box>
        </draw:frame>
        <draw:frame draw:style-name="gr21" draw:text-style-name="P16" draw:layer="layout" svg:width="2.409cm" svg:height="0.581cm" svg:x="29.612cm" svg:y="11.89cm">
          <draw:text-box>
            <text:p text:style-name="P2"><text:span text:style-name="T38">Standard </text:span></text:p>
          </draw:text-box>
        </draw:frame>
        <draw:frame draw:style-name="gr21" draw:text-style-name="P16" draw:layer="layout" svg:width="2.488cm" svg:height="0.581cm" svg:x="29.574cm" svg:y="12.483cm">
          <draw:text-box>
            <text:p text:style-name="P2"><text:span text:style-name="T38">Backprop </text:span></text:p>
          </draw:text-box>
        </draw:frame>
        <draw:frame draw:style-name="gr21" draw:text-style-name="P16" draw:layer="layout" svg:width="3.519cm" svg:height="0.581cm" svg:x="28.981cm" svg:y="13.076cm">
          <draw:text-box>
            <text:p text:style-name="P2"><text:span text:style-name="T38">Through ReLU</text:span></text:p>
          </draw:text-box>
        </draw:frame>
        <draw:frame draw:style-name="gr10" draw:text-style-name="P10" draw:layer="layout" svg:width="0.562cm" svg:height="0.628cm" svg:x="6.274cm" svg:y="12.303cm">
          <draw:text-box>
            <text:p text:style-name="P2"><text:span text:style-name="T39">➢</text:span></text:p>
          </draw:text-box>
        </draw:frame>
        <draw:frame draw:style-name="gr10" draw:text-style-name="P10" draw:layer="layout" svg:width="9.235cm" svg:height="0.661cm" svg:x="7.07cm" svg:y="12.279cm">
          <draw:text-box>
            <text:p text:style-name="P2"><text:span text:style-name="T12">Let us assume that these are the </text:span></text:p>
          </draw:text-box>
        </draw:frame>
        <draw:frame draw:style-name="gr10" draw:text-style-name="P10" draw:layer="layout" svg:width="8.909cm" svg:height="0.661cm" svg:x="7.07cm" svg:y="12.956cm">
          <draw:text-box>
            <text:p text:style-name="P2"><text:span text:style-name="T12">gradient values obtained at this </text:span></text:p>
          </draw:text-box>
        </draw:frame>
        <draw:frame draw:style-name="gr10" draw:text-style-name="P10" draw:layer="layout" svg:width="6.432cm" svg:height="0.661cm" svg:x="7.07cm" svg:y="13.634cm">
          <draw:text-box>
            <text:p text:style-name="P2"><text:span text:style-name="T12">particular layer during </text:span></text:p>
          </draw:text-box>
        </draw:frame>
        <draw:frame draw:style-name="gr10" draw:text-style-name="P10" draw:layer="layout" svg:width="4.788cm" svg:height="0.661cm" svg:x="7.07cm" svg:y="14.311cm">
          <draw:text-box>
            <text:p text:style-name="P2"><text:span text:style-name="T12">backpropagation.</text:span></text:p>
          </draw:text-box>
        </draw:frame>
        <draw:frame draw:style-name="gr11" draw:text-style-name="P10" draw:layer="layout" svg:width="9.923cm" svg:height="0.661cm" svg:x="5.827cm" svg:y="5.604cm">
          <draw:text-box>
            <text:p text:style-name="P2"><text:span text:style-name="T12">These activations continue through </text:span></text:p>
          </draw:text-box>
        </draw:frame>
        <draw:frame draw:style-name="gr10" draw:text-style-name="P10" draw:layer="layout" svg:width="10.282cm" svg:height="0.661cm" svg:x="5.827cm" svg:y="6.283cm">
          <draw:text-box>
            <text:p text:style-name="P2"><text:span text:style-name="T40">flatten → dense → output ( output is </text:span></text:p>
          </draw:text-box>
        </draw:frame>
        <draw:frame draw:style-name="gr10" draw:text-style-name="P10" draw:layer="layout" svg:width="10.857cm" svg:height="0.661cm" svg:x="5.827cm" svg:y="6.96cm">
          <draw:text-box>
            <text:p text:style-name="P2"><text:span text:style-name="T40">compared to the desired output → loss </text:span></text:p>
          </draw:text-box>
        </draw:frame>
        <draw:line draw:style-name="gr25" draw:text-style-name="P5" draw:layer="layout" svg:x1="18.038cm" svg:y1="1.552cm" svg:x2="18.038cm" svg:y2="18.015cm">
          <text:p/>
        </draw:line>
        <draw:frame draw:style-name="gr4" draw:text-style-name="P5" draw:layer="layout" svg:width="1.462cm" svg:height="0.268cm" svg:x="22.729cm" svg:y="14.91cm">
          <draw:image xlink:href="Pictures/10000001000000730000001539B82B48.png" xlink:type="simple" xlink:show="embed" xlink:actuate="onLoad" draw:mime-type="image/png">
            <text:p/>
          </draw:image>
        </draw:frame>
        <draw:frame draw:style-name="gr10" draw:text-style-name="P10" draw:layer="layout" svg:width="1.691cm" svg:height="0.661cm" svg:x="5.827cm" svg:y="7.637cm">
          <draw:text-box>
            <text:p text:style-name="P2"><text:span text:style-name="T12">(error)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3.866cm" svg:height="19.05cm" svg:x="0cm" svg:y="0cm" svg:viewBox="0 0 33867 19051" draw:points="0,19051 33867,19051 33867,0 0,0">
          <text:p/>
        </draw:polygon>
        <draw:frame draw:style-name="gr6" draw:text-style-name="P7" draw:layer="layout" svg:width="19.267cm" svg:height="0.746cm" svg:x="1.024cm" svg:y="1.3cm">
          <draw:text-box>
            <text:p text:style-name="P2"><text:span text:style-name="T4">Guided Backprop = Standard Backprop rule × DeconvNet rule</text:span></text:p>
          </draw:text-box>
        </draw:frame>
        <draw:frame draw:style-name="gr6" draw:text-style-name="P7" draw:layer="layout" svg:width="17.527cm" svg:height="0.746cm" svg:x="15.99cm" svg:y="3.211cm">
          <draw:text-box>
            <text:p text:style-name="P2"><text:span text:style-name="T4">It only checks whether the incoming gradient is positive </text:span></text:p>
          </draw:text-box>
        </draw:frame>
        <draw:frame draw:style-name="gr15" draw:text-style-name="P7" draw:layer="layout" svg:width="3.596cm" svg:height="0.746cm" svg:x="15.99cm" svg:y="3.972cm">
          <draw:text-box>
            <text:p text:style-name="P2"><text:span text:style-name="T4">or negative.</text:span></text:p>
          </draw:text-box>
        </draw:frame>
        <draw:frame draw:style-name="gr6" draw:text-style-name="P7" draw:layer="layout" svg:width="0.634cm" svg:height="0.708cm" svg:x="17.26cm" svg:y="4.763cm">
          <draw:text-box>
            <text:p text:style-name="P2"><text:span text:style-name="T17">➢</text:span></text:p>
          </draw:text-box>
        </draw:frame>
        <draw:frame draw:style-name="gr6" draw:text-style-name="P7" draw:layer="layout" svg:width="14.212cm" svg:height="0.746cm" svg:x="18.056cm" svg:y="4.736cm">
          <draw:text-box>
            <text:p text:style-name="P2"><text:span text:style-name="T4">If the gradient is positive, DeconvNet keeps it.</text:span></text:p>
          </draw:text-box>
        </draw:frame>
        <draw:frame draw:style-name="gr6" draw:text-style-name="P7" draw:layer="layout" svg:width="0.634cm" svg:height="0.708cm" svg:x="17.26cm" svg:y="5.525cm">
          <draw:text-box>
            <text:p text:style-name="P2"><text:span text:style-name="T17">➢</text:span></text:p>
          </draw:text-box>
        </draw:frame>
        <draw:frame draw:style-name="gr6" draw:text-style-name="P7" draw:layer="layout" svg:width="13.246cm" svg:height="0.746cm" svg:x="18.056cm" svg:y="5.498cm">
          <draw:text-box>
            <text:p text:style-name="P2"><text:span text:style-name="T4">If the gradient is negative, it sets it to zero.</text:span></text:p>
          </draw:text-box>
        </draw:frame>
        <draw:frame draw:style-name="gr6" draw:text-style-name="P7" draw:layer="layout" svg:width="15.762cm" svg:height="0.746cm" svg:x="15.99cm" svg:y="6.26cm">
          <draw:text-box>
            <text:p text:style-name="P2"><text:span text:style-name="T4">This forms a </text:span><text:span text:style-name="T6">backward-positive mask (backward </text:span></text:p>
          </draw:text-box>
        </draw:frame>
        <draw:frame draw:style-name="gr4" draw:text-style-name="P5" draw:layer="layout" svg:width="4.533cm" svg:height="4.573cm" svg:x="16.046cm" svg:y="7.968cm">
          <draw:image xlink:href="Pictures/10000000000000D9000000DBC5B189A0.jpg" xlink:type="simple" xlink:show="embed" xlink:actuate="onLoad" draw:mime-type="image/jpeg">
            <text:p/>
          </draw:image>
        </draw:frame>
        <draw:polygon draw:style-name="gr8" draw:text-style-name="P5" draw:layer="layout" svg:width="2.544cm" svg:height="1.131cm" svg:x="17.039cm" svg:y="12.441cm" svg:viewBox="0 0 2545 1132" draw:points="0,1132 2545,1132 2545,0 0,0">
          <text:p/>
        </draw:polygon>
        <draw:frame draw:style-name="gr6" draw:text-style-name="P7" draw:layer="layout" svg:width="4.116cm" svg:height="0.746cm" svg:x="15.99cm" svg:y="7.022cm">
          <draw:text-box>
            <text:p text:style-name="P2"><text:span text:style-name="T6">ReLU mask)</text:span><text:span text:style-name="T4">.</text:span></text:p>
          </draw:text-box>
        </draw:frame>
        <draw:frame draw:style-name="gr6" draw:text-style-name="P7" draw:layer="layout" svg:width="0.634cm" svg:height="0.636cm" svg:x="17.697cm" svg:y="12.732cm">
          <draw:text-box>
            <text:p text:style-name="P2"><text:span text:style-name="T18">𝑅</text:span></text:p>
          </draw:text-box>
        </draw:frame>
        <draw:frame draw:style-name="gr14" draw:text-style-name="P12" draw:layer="layout" svg:width="0.465cm" svg:height="0.467cm" svg:x="18.091cm" svg:y="13.024cm">
          <draw:text-box>
            <text:p text:style-name="P2"><text:span text:style-name="T19">𝑖</text:span></text:p>
          </draw:text-box>
        </draw:frame>
        <draw:polygon draw:style-name="gr8" draw:text-style-name="P5" draw:layer="layout" svg:width="3.941cm" svg:height="1.485cm" svg:x="0.999cm" svg:y="9.254cm" svg:viewBox="0 0 3942 1486" draw:points="0,1486 3942,1486 3942,0 0,0">
          <text:p/>
        </draw:polygon>
        <draw:frame draw:style-name="gr14" draw:text-style-name="P12" draw:layer="layout" svg:width="0.755cm" svg:height="0.467cm" svg:x="18.12cm" svg:y="12.605cm">
          <draw:text-box>
            <text:p text:style-name="P2"><text:span text:style-name="T19">𝑙+1</text:span></text:p>
          </draw:text-box>
        </draw:frame>
        <draw:frame draw:style-name="gr30" draw:text-style-name="P21" draw:layer="layout" svg:width="0.706cm" svg:height="0.708cm" svg:x="1.256cm" svg:y="9.571cm">
          <draw:text-box>
            <text:p text:style-name="P2"><text:span text:style-name="T41">𝑅</text:span></text:p>
          </draw:text-box>
        </draw:frame>
        <draw:frame draw:style-name="gr31" draw:text-style-name="P22" draw:layer="layout" svg:width="0.515cm" svg:height="0.517cm" svg:x="1.692cm" svg:y="9.893cm">
          <draw:text-box>
            <text:p text:style-name="P2"><text:span text:style-name="T42">𝑖</text:span></text:p>
          </draw:text-box>
        </draw:frame>
        <draw:frame draw:style-name="gr31" draw:text-style-name="P22" draw:layer="layout" svg:width="0.837cm" svg:height="0.517cm" svg:x="1.726cm" svg:y="9.432cm">
          <draw:text-box>
            <text:p text:style-name="P2"><text:span text:style-name="T42">𝑙+1</text:span></text:p>
          </draw:text-box>
        </draw:frame>
        <draw:frame draw:style-name="gr30" draw:text-style-name="P21" draw:layer="layout" svg:width="1.079cm" svg:height="0.708cm" svg:x="2.826cm" svg:y="9.571cm">
          <draw:text-box>
            <text:p text:style-name="P2"><text:span text:style-name="T41">&gt; 0</text:span></text:p>
          </draw:text-box>
        </draw:frame>
        <draw:frame draw:style-name="gr4" draw:text-style-name="P5" draw:layer="layout" svg:width="3.935cm" svg:height="3.601cm" svg:x="4.937cm" svg:y="8.133cm">
          <draw:image xlink:href="Pictures/10000001000001350000011BBD1C4BFA.png" xlink:type="simple" xlink:show="embed" xlink:actuate="onLoad" draw:mime-type="image/png">
            <text:p/>
          </draw:image>
        </draw:frame>
        <draw:polygon draw:style-name="gr8" draw:text-style-name="P5" draw:layer="layout" svg:width="19.714cm" svg:height="1.338cm" svg:x="5.825cm" svg:y="13.343cm" svg:viewBox="0 0 19715 1339" draw:points="0,1339 19715,1339 19715,0 0,0">
          <text:p/>
        </draw:polygon>
        <draw:frame draw:style-name="gr30" draw:text-style-name="P21" draw:layer="layout" svg:width="0.819cm" svg:height="0.822cm" svg:x="3.944cm" svg:y="9.465cm">
          <draw:text-box>
            <text:p text:style-name="P2"><text:span text:style-name="T43"><text:s/>=</text:span></text:p>
          </draw:text-box>
        </draw:frame>
        <draw:frame draw:style-name="gr6" draw:text-style-name="P7" draw:layer="layout" svg:width="10.783cm" svg:height="0.746cm" svg:x="6.21cm" svg:y="13.545cm">
          <draw:text-box>
            <text:p text:style-name="P2"><text:span text:style-name="T4">DeconvNet rule (Apply the mask): <text:s/></text:span></text:p>
          </draw:text-box>
        </draw:frame>
        <draw:frame draw:style-name="gr6" draw:text-style-name="P7" draw:layer="layout" svg:width="0.634cm" svg:height="0.636cm" svg:x="16.994cm" svg:y="13.649cm">
          <draw:text-box>
            <text:p text:style-name="P2"><text:span text:style-name="T18">𝑅</text:span></text:p>
          </draw:text-box>
        </draw:frame>
        <draw:frame draw:style-name="gr14" draw:text-style-name="P12" draw:layer="layout" svg:width="0.465cm" svg:height="0.467cm" svg:x="17.388cm" svg:y="13.941cm">
          <draw:text-box>
            <text:p text:style-name="P2"><text:span text:style-name="T19">𝑖</text:span></text:p>
          </draw:text-box>
        </draw:frame>
        <draw:frame draw:style-name="gr14" draw:text-style-name="P12" draw:layer="layout" svg:width="0.465cm" svg:height="0.467cm" svg:x="17.418cm" svg:y="13.522cm">
          <draw:text-box>
            <text:p text:style-name="P2"><text:span text:style-name="T19">𝑙</text:span></text:p>
          </draw:text-box>
        </draw:frame>
        <draw:path draw:style-name="gr23" draw:text-style-name="P17" draw:layer="layout" svg:width="2.875cm" svg:height="0.767cm" svg:x="18.503cm" svg:y="13.575cm" svg:viewBox="0 0 2876 768" svg:d="M2674 0c65 17 115 61 150 132s52 155 52 251c0 97-17 181-52 253-35 71-85 115-150 132l-7-26c50-18 87-59 113-122 26-65 39-143 39-236 0-94-13-173-39-236s-63-104-113-123zM203 0l8 25c-51 19-89 60-115 123s-38 142-38 236c0 93 12 171 38 236 26 63 64 104 115 122l-8 26c-66-17-115-61-150-132-35-72-53-156-53-253 0-96 18-180 53-251s84-115 150-132z">
          <text:p/>
        </draw:path>
        <draw:frame draw:style-name="gr6" draw:text-style-name="P7" draw:layer="layout" svg:width="1.021cm" svg:height="0.636cm" svg:x="17.799cm" svg:y="13.649cm">
          <draw:text-box>
            <text:p text:style-name="P2"><text:span text:style-name="T18">= 𝑅</text:span></text:p>
          </draw:text-box>
        </draw:frame>
        <draw:frame draw:style-name="gr14" draw:text-style-name="P12" draw:layer="layout" svg:width="0.465cm" svg:height="0.467cm" svg:x="19.132cm" svg:y="13.941cm">
          <draw:text-box>
            <text:p text:style-name="P2"><text:span text:style-name="T19">𝑖</text:span></text:p>
          </draw:text-box>
        </draw:frame>
        <draw:frame draw:style-name="gr14" draw:text-style-name="P12" draw:layer="layout" svg:width="0.755cm" svg:height="0.467cm" svg:x="19.162cm" svg:y="13.522cm">
          <draw:text-box>
            <text:p text:style-name="P2"><text:span text:style-name="T19">𝑙+1</text:span></text:p>
          </draw:text-box>
        </draw:frame>
        <draw:frame draw:style-name="gr6" draw:text-style-name="P7" draw:layer="layout" svg:width="2.09cm" svg:height="0.636cm" svg:x="20.148cm" svg:y="13.649cm">
          <draw:text-box>
            <text:p text:style-name="P2"><text:span text:style-name="T18">&gt; 0 ∙ <text:s text:c="2"/>𝑅</text:span></text:p>
          </draw:text-box>
        </draw:frame>
        <draw:frame draw:style-name="gr14" draw:text-style-name="P12" draw:layer="layout" svg:width="0.465cm" svg:height="0.467cm" svg:x="22.434cm" svg:y="13.941cm">
          <draw:text-box>
            <text:p text:style-name="P2"><text:span text:style-name="T19">𝑖</text:span></text:p>
          </draw:text-box>
        </draw:frame>
        <draw:frame draw:style-name="gr4" draw:text-style-name="P5" draw:layer="layout" svg:width="14.836cm" svg:height="4.277cm" svg:x="15.365cm" svg:y="14.209cm">
          <draw:image xlink:href="Pictures/1000000100000490000001507C2D32F4.png" xlink:type="simple" xlink:show="embed" xlink:actuate="onLoad" draw:mime-type="image/png">
            <text:p/>
          </draw:image>
        </draw:frame>
        <draw:frame draw:style-name="gr14" draw:text-style-name="P12" draw:layer="layout" svg:width="0.755cm" svg:height="0.467cm" svg:x="22.464cm" svg:y="13.522cm">
          <draw:text-box>
            <text:p text:style-name="P2"><text:span text:style-name="T19">𝑙+1</text:span></text:p>
          </draw:text-box>
        </draw:frame>
        <draw:frame draw:style-name="gr6" draw:text-style-name="P7" draw:layer="layout" svg:width="5.082cm" svg:height="0.746cm" svg:x="25.367cm" svg:y="13.295cm">
          <draw:text-box>
            <text:p text:style-name="P2"><text:span text:style-name="T6">DeconvNet rule</text:span></text:p>
          </draw:text-box>
        </draw:frame>
        <draw:frame draw:style-name="gr11" draw:text-style-name="P10" draw:layer="layout" svg:width="12.432cm" svg:height="0.661cm" svg:x="1.457cm" svg:y="14.992cm">
          <draw:text-box>
            <text:p text:style-name="P2"><text:span text:style-name="T12">If the gradient coming in is negative, block it.</text:span></text:p>
          </draw:text-box>
        </draw:frame>
        <draw:frame draw:style-name="gr10" draw:text-style-name="P10" draw:layer="layout" svg:width="5.169cm" svg:height="0.661cm" svg:x="1.457cm" svg:y="15.671cm">
          <draw:text-box>
            <text:p text:style-name="P2"><text:span text:style-name="T12">If positive, allow it.</text:span></text:p>
          </draw:text-box>
        </draw:frame>
        <draw:frame draw:style-name="gr10" draw:text-style-name="P10" draw:layer="layout" svg:width="13.199cm" svg:height="0.661cm" svg:x="1.457cm" svg:y="16.348cm">
          <draw:text-box>
            <text:p text:style-name="P2"><text:span text:style-name="T12">This removes negative influences and sharpens </text:span></text:p>
          </draw:text-box>
        </draw:frame>
        <draw:path draw:style-name="gr7" draw:text-style-name="P8" draw:layer="layout" svg:width="0.239cm" svg:height="0.751cm" svg:x="17.566cm" svg:y="2.191cm" svg:viewBox="0 0 240 752" svg:d="M159 0v554h-79v-554zM240 514l-121 238-119-238z">
          <text:p/>
        </draw:path>
        <draw:frame draw:style-name="gr10" draw:text-style-name="P10" draw:layer="layout" svg:width="4.709cm" svg:height="0.661cm" svg:x="1.457cm" svg:y="17.025cm">
          <draw:text-box>
            <text:p text:style-name="P2"><text:span text:style-name="T12">the visualization.</text:span></text:p>
          </draw:text-box>
        </draw:frame>
        <draw:frame draw:style-name="gr15" draw:text-style-name="P7" draw:layer="layout" svg:width="11.418cm" svg:height="0.746cm" svg:x="20.836cm" svg:y="8.571cm">
          <draw:text-box>
            <text:p text:style-name="P2"><text:span text:style-name="T4">This is the gradient flowing into this </text:span></text:p>
          </draw:text-box>
        </draw:frame>
        <draw:frame draw:style-name="gr6" draw:text-style-name="P7" draw:layer="layout" svg:width="7.089cm" svg:height="0.746cm" svg:x="20.836cm" svg:y="9.335cm">
          <draw:text-box>
            <text:p text:style-name="P2"><text:span text:style-name="T4">layer during backprop.</text:span></text:p>
          </draw:text-box>
        </draw:frame>
        <draw:frame draw:style-name="gr6" draw:text-style-name="P7" draw:layer="layout" svg:width="10.403cm" svg:height="0.746cm" svg:x="1.024cm" svg:y="6.959cm">
          <draw:text-box>
            <text:p text:style-name="P2"><text:span text:style-name="T4">Create the backward ReLU mask:</text:span></text:p>
          </draw:text-box>
        </draw:frame>
        <draw:frame draw:style-name="gr4" draw:text-style-name="P5" draw:layer="layout" svg:width="0.996cm" svg:height="1.038cm" svg:x="9.14cm" svg:y="8.831cm">
          <draw:image xlink:href="Pictures/100000010000004E00000051E67E02DB.png" xlink:type="simple" xlink:show="embed" xlink:actuate="onLoad" draw:mime-type="image/png">
            <text:p/>
          </draw:image>
        </draw:frame>
        <draw:frame draw:style-name="gr21" draw:text-style-name="P16" draw:layer="layout" svg:width="4.875cm" svg:height="0.581cm" svg:x="9.44cm" svg:y="8.398cm">
          <draw:text-box>
            <text:p text:style-name="P2"><text:span text:style-name="T38">This mask tells you:</text:span></text:p>
          </draw:text-box>
        </draw:frame>
        <draw:frame draw:style-name="gr21" draw:text-style-name="P16" draw:layer="layout" svg:width="6.272cm" svg:height="0.581cm" svg:x="9.843cm" svg:y="8.999cm">
          <draw:text-box>
            <text:p text:style-name="P2"><text:span text:style-name="T29"><text:s/>1 = gradient is positive </text:span></text:p>
          </draw:text-box>
        </draw:frame>
        <draw:frame draw:style-name="gr4" draw:text-style-name="P5" draw:layer="layout" svg:width="0.996cm" svg:height="1.038cm" svg:x="9.14cm" svg:y="10.016cm">
          <draw:image xlink:href="Pictures/100000010000004E00000051E67E02DB.png" xlink:type="simple" xlink:show="embed" xlink:actuate="onLoad" draw:mime-type="image/png">
            <text:p/>
          </draw:image>
        </draw:frame>
        <draw:frame draw:style-name="gr21" draw:text-style-name="P16" draw:layer="layout" svg:width="1.993cm" svg:height="0.581cm" svg:x="9.44cm" svg:y="9.588cm">
          <draw:text-box>
            <text:p text:style-name="P2"><text:span text:style-name="T44">→ allow</text:span></text:p>
          </draw:text-box>
        </draw:frame>
        <draw:frame draw:style-name="gr21" draw:text-style-name="P16" draw:layer="layout" svg:width="6.411cm" svg:height="0.581cm" svg:x="9.843cm" svg:y="10.185cm">
          <draw:text-box>
            <text:p text:style-name="P2"><text:span text:style-name="T29"><text:s/>0 = gradient is negative </text:span></text:p>
          </draw:text-box>
        </draw:frame>
        <draw:frame draw:style-name="gr21" draw:text-style-name="P16" draw:layer="layout" svg:width="2.053cm" svg:height="0.581cm" svg:x="9.44cm" svg:y="10.774cm">
          <draw:text-box>
            <text:p text:style-name="P2"><text:span text:style-name="T44">→ block</text:span></text:p>
          </draw:text-box>
        </draw:frame>
        <draw:frame draw:style-name="gr21" draw:text-style-name="P16" draw:layer="layout" svg:width="3.192cm" svg:height="0.581cm" svg:x="21.023cm" svg:y="18.254cm">
          <draw:text-box>
            <text:p text:style-name="P2"><text:span text:style-name="T38">Raw gradient</text:span></text:p>
          </draw:text-box>
        </draw:frame>
        <draw:frame draw:style-name="gr4" draw:text-style-name="P5" draw:layer="layout" svg:width="22.141cm" svg:height="14.318cm" svg:x="1.367cm" svg:y="0.233cm">
          <draw:image xlink:href="Pictures/10000001000006CF0000046708080689.png" xlink:type="simple" xlink:show="embed" xlink:actuate="onLoad" draw:mime-type="image/png">
            <text:p/>
          </draw:image>
        </draw:frame>
        <draw:frame draw:style-name="gr21" draw:text-style-name="P16" draw:layer="layout" svg:width="4.004cm" svg:height="0.581cm" svg:x="25.873cm" svg:y="18.254cm">
          <draw:text-box>
            <text:p text:style-name="P2"><text:span text:style-name="T38">Filtered gradient</text:span></text:p>
          </draw:text-box>
        </draw:frame>
      </draw:page>
      <draw:page draw:name="page7" draw:style-name="dp1" draw:master-page-name="master-page3">
        <draw:polygon draw:style-name="gr32" draw:text-style-name="P1" draw:layer="layout" svg:width="33.866cm" svg:height="19.05cm" svg:x="0cm" svg:y="0cm" svg:viewBox="0 0 33867 19051" draw:points="0,19051 33867,19051 33867,0 0,0">
          <text:p/>
        </draw:polygon>
        <draw:polygon draw:style-name="gr8" draw:text-style-name="P5" draw:layer="layout" svg:width="6.303cm" svg:height="1.346cm" svg:x="10.985cm" svg:y="3.848cm" svg:viewBox="0 0 6304 1347" draw:points="0,1347 6304,1347 6304,0 0,0">
          <text:p/>
        </draw:polygon>
        <draw:path draw:style-name="gr23" draw:text-style-name="P17" draw:layer="layout" svg:width="2.479cm" svg:height="0.854cm" svg:x="11.72cm" svg:y="4.085cm" svg:viewBox="0 0 2480 855" svg:d="M2256 0c72 19 127 68 166 147s58 173 58 281-19 202-58 281-94 128-166 146l-9-28c56-21 98-66 127-137 29-70 43-158 43-262s-14-192-43-262c-29-71-71-116-127-137zM224 0l9 29c-56 21-98 66-127 137-28 70-43 158-43 262s15 192 43 262c29 71 71 116 127 137l-9 28c-71-18-127-67-166-146s-58-173-58-281 19-202 58-281 95-128 166-147z">
          <text:p/>
        </draw:path>
        <draw:frame draw:style-name="gr15" draw:text-style-name="P7" draw:layer="layout" svg:width="19.267cm" svg:height="0.746cm" svg:x="3.164cm" svg:y="2.731cm">
          <draw:text-box>
            <text:p text:style-name="P2"><text:span text:style-name="T4">Guided Backprop = Standard Backprop rule × DeconvNet rule</text:span></text:p>
          </draw:text-box>
        </draw:frame>
        <draw:frame draw:style-name="gr30" draw:text-style-name="P21" draw:layer="layout" svg:width="0.706cm" svg:height="0.708cm" svg:x="11.977cm" svg:y="4.166cm">
          <draw:text-box>
            <text:p text:style-name="P2"><text:span text:style-name="T45">𝑓</text:span></text:p>
          </draw:text-box>
        </draw:frame>
        <draw:frame draw:style-name="gr31" draw:text-style-name="P22" draw:layer="layout" svg:width="0.515cm" svg:height="0.517cm" svg:x="12.257cm" svg:y="4.488cm">
          <draw:text-box>
            <text:p text:style-name="P2"><text:span text:style-name="T46">𝑖</text:span></text:p>
          </draw:text-box>
        </draw:frame>
        <draw:frame draw:style-name="gr31" draw:text-style-name="P22" draw:layer="layout" svg:width="0.515cm" svg:height="0.517cm" svg:x="12.41cm" svg:y="4.026cm">
          <draw:text-box>
            <text:p text:style-name="P2"><text:span text:style-name="T46">𝑙</text:span></text:p>
          </draw:text-box>
        </draw:frame>
        <draw:frame draw:style-name="gr30" draw:text-style-name="P21" draw:layer="layout" svg:width="2.327cm" svg:height="0.708cm" svg:x="12.833cm" svg:y="4.166cm">
          <draw:text-box>
            <text:p text:style-name="P2"><text:span text:style-name="T45">&gt; 0 <text:s/>∙ <text:s/>𝑅</text:span></text:p>
          </draw:text-box>
        </draw:frame>
        <draw:frame draw:style-name="gr31" draw:text-style-name="P22" draw:layer="layout" svg:width="0.515cm" svg:height="0.517cm" svg:x="15.525cm" svg:y="4.488cm">
          <draw:text-box>
            <text:p text:style-name="P2"><text:span text:style-name="T46">𝑖</text:span></text:p>
          </draw:text-box>
        </draw:frame>
        <draw:frame draw:style-name="gr31" draw:text-style-name="P22" draw:layer="layout" svg:width="0.837cm" svg:height="0.517cm" svg:x="15.559cm" svg:y="4.026cm">
          <draw:text-box>
            <text:p text:style-name="P2"><text:span text:style-name="T46">𝑙+1</text:span></text:p>
          </draw:text-box>
        </draw:frame>
        <draw:polygon draw:style-name="gr8" draw:text-style-name="P5" draw:layer="layout" svg:width="6.299cm" svg:height="1.134cm" svg:x="17.284cm" svg:y="3.848cm" svg:viewBox="0 0 6300 1135" draw:points="0,1135 6300,1135 6300,0 0,0">
          <text:p/>
        </draw:polygon>
        <draw:path draw:style-name="gr23" draw:text-style-name="P17" draw:layer="layout" svg:width="2.87cm" svg:height="0.767cm" svg:x="18.078cm" svg:y="4.073cm" svg:viewBox="0 0 2871 768" svg:d="M2670 0c64 17 114 61 149 132 35 72 52 156 52 253s-17 181-52 252-85 114-149 131l-8-25c50-19 88-60 114-123 25-63 38-141 38-235s-13-172-38-235c-26-65-64-106-114-124zM201 0l8 26c-50 18-88 59-113 124-26 63-39 141-39 235s13 172 39 235c25 63 63 104 113 123l-8 25c-64-17-114-60-148-131-35-71-53-155-53-252s18-181 53-253c34-71 84-115 148-132z">
          <text:p/>
        </draw:path>
        <draw:frame draw:style-name="gr30" draw:text-style-name="P21" draw:layer="layout" svg:width="0.706cm" svg:height="0.708cm" svg:x="16.465cm" svg:y="4.166cm">
          <draw:text-box>
            <text:p text:style-name="P2"><text:span text:style-name="T45"><text:s/></text:span></text:p>
          </draw:text-box>
        </draw:frame>
        <draw:frame draw:style-name="gr6" draw:text-style-name="P7" draw:layer="layout" svg:width="0.634cm" svg:height="0.636cm" svg:x="18.308cm" svg:y="4.146cm">
          <draw:text-box>
            <text:p text:style-name="P2"><text:span text:style-name="T18">𝑅</text:span></text:p>
          </draw:text-box>
        </draw:frame>
        <draw:frame draw:style-name="gr14" draw:text-style-name="P12" draw:layer="layout" svg:width="0.465cm" svg:height="0.467cm" svg:x="18.703cm" svg:y="4.438cm">
          <draw:text-box>
            <text:p text:style-name="P2"><text:span text:style-name="T19">𝑖</text:span></text:p>
          </draw:text-box>
        </draw:frame>
        <draw:frame draw:style-name="gr14" draw:text-style-name="P12" draw:layer="layout" svg:width="0.755cm" svg:height="0.467cm" svg:x="18.733cm" svg:y="4.019cm">
          <draw:text-box>
            <text:p text:style-name="P2"><text:span text:style-name="T19">𝑙+1</text:span></text:p>
          </draw:text-box>
        </draw:frame>
        <draw:frame draw:style-name="gr6" draw:text-style-name="P7" draw:layer="layout" svg:width="2.09cm" svg:height="0.636cm" svg:x="19.719cm" svg:y="4.146cm">
          <draw:text-box>
            <text:p text:style-name="P2"><text:span text:style-name="T18">&gt; 0 ∙ <text:s text:c="2"/>𝑅</text:span></text:p>
          </draw:text-box>
        </draw:frame>
        <draw:frame draw:style-name="gr14" draw:text-style-name="P12" draw:layer="layout" svg:width="0.465cm" svg:height="0.467cm" svg:x="22.009cm" svg:y="4.438cm">
          <draw:text-box>
            <text:p text:style-name="P2"><text:span text:style-name="T19">𝑖</text:span></text:p>
          </draw:text-box>
        </draw:frame>
        <draw:polygon draw:style-name="gr8" draw:text-style-name="P5" draw:layer="layout" svg:width="18.762cm" svg:height="3.509cm" svg:x="2.781cm" svg:y="6.189cm" svg:viewBox="0 0 18763 3510" draw:points="0,3510 18763,3510 18763,0 0,0">
          <text:p/>
        </draw:polygon>
        <draw:frame draw:style-name="gr14" draw:text-style-name="P12" draw:layer="layout" svg:width="0.755cm" svg:height="0.467cm" svg:x="22.039cm" svg:y="4.019cm">
          <draw:text-box>
            <text:p text:style-name="P2"><text:span text:style-name="T19">𝑙+1</text:span></text:p>
          </draw:text-box>
        </draw:frame>
        <draw:frame draw:style-name="gr6" draw:text-style-name="P7" draw:layer="layout" svg:width="17.604cm" svg:height="0.746cm" svg:x="3.164cm" svg:y="6.396cm">
          <draw:text-box>
            <text:p text:style-name="P2"><text:span text:style-name="T4">Guided Backprop = apply </text:span><text:span text:style-name="T6">both gates at the same time</text:span><text:span text:style-name="T4">:</text:span></text:p>
          </draw:text-box>
        </draw:frame>
        <draw:frame draw:style-name="gr6" draw:text-style-name="P7" draw:layer="layout" svg:width="0.634cm" svg:height="0.636cm" svg:x="7.542cm" svg:y="8.079cm">
          <draw:text-box>
            <text:p text:style-name="P2"><text:span text:style-name="T18">𝑅</text:span></text:p>
          </draw:text-box>
        </draw:frame>
        <draw:frame draw:style-name="gr14" draw:text-style-name="P12" draw:layer="layout" svg:width="0.465cm" svg:height="0.467cm" svg:x="7.936cm" svg:y="8.372cm">
          <draw:text-box>
            <text:p text:style-name="P2"><text:span text:style-name="T19">𝑖</text:span></text:p>
          </draw:text-box>
        </draw:frame>
        <draw:frame draw:style-name="gr14" draw:text-style-name="P12" draw:layer="layout" svg:width="0.465cm" svg:height="0.467cm" svg:x="7.965cm" svg:y="7.953cm">
          <draw:text-box>
            <text:p text:style-name="P2"><text:span text:style-name="T19">𝑙</text:span></text:p>
          </draw:text-box>
        </draw:frame>
        <draw:path draw:style-name="gr23" draw:text-style-name="P17" draw:layer="layout" svg:width="2.231cm" svg:height="0.767cm" svg:x="9.053cm" svg:y="8.006cm" svg:viewBox="0 0 2232 768" svg:d="M2030 0c65 17 114 62 149 133s53 155 53 252-18 181-53 251c-35 71-84 116-149 132l-7-25c50-19 87-60 113-123s39-142 39-235c0-94-13-172-39-235s-63-104-113-124zM201 0l8 26c-50 20-88 61-114 124-25 63-38 141-38 235 0 93 13 172 38 235 26 63 64 104 114 123l-8 25c-64-16-114-61-149-132-35-70-52-154-52-251s17-181 52-252 85-116 149-133z">
          <text:p/>
        </draw:path>
        <draw:frame draw:style-name="gr6" draw:text-style-name="P7" draw:layer="layout" svg:width="0.965cm" svg:height="0.636cm" svg:x="8.346cm" svg:y="8.079cm">
          <draw:text-box>
            <text:p text:style-name="P2"><text:span text:style-name="T18">= 𝑓</text:span></text:p>
          </draw:text-box>
        </draw:frame>
        <draw:frame draw:style-name="gr14" draw:text-style-name="P12" draw:layer="layout" svg:width="0.465cm" svg:height="0.467cm" svg:x="9.536cm" svg:y="8.372cm">
          <draw:text-box>
            <text:p text:style-name="P2"><text:span text:style-name="T19">𝑖</text:span></text:p>
          </draw:text-box>
        </draw:frame>
        <draw:frame draw:style-name="gr14" draw:text-style-name="P12" draw:layer="layout" svg:width="0.465cm" svg:height="0.467cm" svg:x="9.671cm" svg:y="7.953cm">
          <draw:text-box>
            <text:p text:style-name="P2"><text:span text:style-name="T19">𝑙</text:span></text:p>
          </draw:text-box>
        </draw:frame>
        <draw:path draw:style-name="gr23" draw:text-style-name="P17" draw:layer="layout" svg:width="2.875cm" svg:height="0.767cm" svg:x="12.143cm" svg:y="8.006cm" svg:viewBox="0 0 2876 768" svg:d="M2674 0c65 17 114 62 149 133s53 155 53 252-18 181-53 251c-35 71-84 116-149 132l-8-25c50-19 88-60 114-123s38-142 38-235c0-94-12-172-38-235s-64-104-114-124zM202 0l7 26c-50 20-87 61-113 124s-39 141-39 235c0 93 13 172 39 235s63 104 113 123l-7 25c-65-16-115-61-150-132-35-70-52-154-52-251s17-181 52-252 85-116 150-133z">
          <text:p/>
        </draw:path>
        <draw:frame draw:style-name="gr6" draw:text-style-name="P7" draw:layer="layout" svg:width="1.545cm" svg:height="0.636cm" svg:x="10.052cm" svg:y="8.079cm">
          <draw:text-box>
            <text:p text:style-name="P2"><text:span text:style-name="T18">&gt; 0 <text:s text:c="2"/>∙</text:span></text:p>
          </draw:text-box>
        </draw:frame>
        <draw:frame draw:style-name="gr6" draw:text-style-name="P7" draw:layer="layout" svg:width="0.634cm" svg:height="0.636cm" svg:x="12.373cm" svg:y="8.079cm">
          <draw:text-box>
            <text:p text:style-name="P2"><text:span text:style-name="T18">𝑅</text:span></text:p>
          </draw:text-box>
        </draw:frame>
        <draw:frame draw:style-name="gr14" draw:text-style-name="P12" draw:layer="layout" svg:width="0.465cm" svg:height="0.467cm" svg:x="12.767cm" svg:y="8.372cm">
          <draw:text-box>
            <text:p text:style-name="P2"><text:span text:style-name="T19">𝑖</text:span></text:p>
          </draw:text-box>
        </draw:frame>
        <draw:frame draw:style-name="gr14" draw:text-style-name="P12" draw:layer="layout" svg:width="0.755cm" svg:height="0.467cm" svg:x="12.797cm" svg:y="7.953cm">
          <draw:text-box>
            <text:p text:style-name="P2"><text:span text:style-name="T19">𝑙+1</text:span></text:p>
          </draw:text-box>
        </draw:frame>
        <draw:frame draw:style-name="gr6" draw:text-style-name="P7" draw:layer="layout" svg:width="2.09cm" svg:height="0.636cm" svg:x="13.787cm" svg:y="8.079cm">
          <draw:text-box>
            <text:p text:style-name="P2"><text:span text:style-name="T18">&gt; 0 ∙ <text:s text:c="2"/>𝑅</text:span></text:p>
          </draw:text-box>
        </draw:frame>
        <draw:frame draw:style-name="gr14" draw:text-style-name="P12" draw:layer="layout" svg:width="0.465cm" svg:height="0.467cm" svg:x="16.073cm" svg:y="8.372cm">
          <draw:text-box>
            <text:p text:style-name="P2"><text:span text:style-name="T19">𝑖</text:span></text:p>
          </draw:text-box>
        </draw:frame>
        <draw:path draw:style-name="gr33" draw:text-style-name="P5" draw:layer="layout" svg:width="2.246cm" svg:height="0.506cm" svg:x="8.948cm" svg:y="9.019cm" svg:viewBox="0 0 2247 507" svg:d="M2247 0c0 139-19 253-42 253h-991c-24 0-43 114-43 254 0-140-19-254-43-254h-1086c-23 0-42-114-42-253">
          <text:p/>
        </draw:path>
        <draw:frame draw:style-name="gr14" draw:text-style-name="P12" draw:layer="layout" svg:width="0.755cm" svg:height="0.467cm" svg:x="16.103cm" svg:y="7.953cm">
          <draw:text-box>
            <text:p text:style-name="P2"><text:span text:style-name="T19">𝑙+1</text:span></text:p>
          </draw:text-box>
        </draw:frame>
        <draw:path draw:style-name="gr33" draw:text-style-name="P5" draw:layer="layout" svg:width="2.246cm" svg:height="0.506cm" svg:x="12.435cm" svg:y="9.019cm" svg:viewBox="0 0 2247 507" svg:d="M2247 0c0 139-19 253-42 253h-993c-23 0-42 114-42 254 0-140-19-254-42-254h-1086c-23 0-42-114-42-253">
          <text:p/>
        </draw:path>
        <draw:frame draw:style-name="gr11" draw:text-style-name="P10" draw:layer="layout" svg:width="3.752cm" svg:height="0.661cm" svg:x="8.19cm" svg:y="9.66cm">
          <draw:text-box>
            <text:p text:style-name="P2"><text:span text:style-name="T12">active neuron</text:span></text:p>
          </draw:text-box>
        </draw:frame>
        <draw:frame draw:style-name="gr4" draw:text-style-name="P5" draw:layer="layout" svg:width="3.546cm" svg:height="3.601cm" svg:x="8.256cm" svg:y="10.881cm">
          <draw:image xlink:href="Pictures/10000001000001170000011B13B0B7CB.png" xlink:type="simple" xlink:show="embed" xlink:actuate="onLoad" draw:mime-type="image/png">
            <text:p/>
          </draw:image>
        </draw:frame>
        <draw:frame draw:style-name="gr4" draw:text-style-name="P5" draw:layer="layout" svg:width="4.24cm" svg:height="4.278cm" svg:x="17.923cm" svg:y="10.74cm">
          <draw:image xlink:href="Pictures/10000000000000D9000000DBC5B189A0.jpg" xlink:type="simple" xlink:show="embed" xlink:actuate="onLoad" draw:mime-type="image/jpeg">
            <text:p/>
          </draw:image>
        </draw:frame>
        <draw:polygon draw:style-name="gr8" draw:text-style-name="P5" draw:layer="layout" svg:width="1.68cm" svg:height="1.287cm" svg:x="11.616cm" svg:y="11.726cm" svg:viewBox="0 0 1681 1288" draw:points="0,1288 1681,1288 1681,0 0,0">
          <text:p/>
        </draw:polygon>
        <draw:frame draw:style-name="gr10" draw:text-style-name="P10" draw:layer="layout" svg:width="4.551cm" svg:height="0.661cm" svg:x="12.615cm" svg:y="9.63cm">
          <draw:text-box>
            <text:p text:style-name="P2"><text:span text:style-name="T12">positive gradient</text:span></text:p>
          </draw:text-box>
        </draw:frame>
        <draw:polygon draw:style-name="gr8" draw:text-style-name="P5" draw:layer="layout" svg:width="1.681cm" svg:height="1.287cm" svg:x="16.717cm" svg:y="11.654cm" svg:viewBox="0 0 1682 1288" draw:points="0,1288 1682,1288 1682,0 0,0">
          <text:p/>
        </draw:polygon>
        <draw:frame draw:style-name="gr34" draw:text-style-name="P23" draw:layer="layout" svg:width="0.846cm" svg:height="0.848cm" svg:x="12.334cm" svg:y="11.987cm">
          <draw:text-box>
            <text:p text:style-name="P2"><text:span text:style-name="T47">∙</text:span></text:p>
          </draw:text-box>
        </draw:frame>
        <draw:polygon draw:style-name="gr8" draw:text-style-name="P5" draw:layer="layout" svg:width="2.358cm" svg:height="1.113cm" svg:x="22.021cm" svg:y="11.984cm" svg:viewBox="0 0 2359 1114" draw:points="0,1114 2359,1114 2359,0 0,0">
          <text:p/>
        </draw:polygon>
        <draw:frame draw:style-name="gr34" draw:text-style-name="P23" draw:layer="layout" svg:width="0.846cm" svg:height="0.848cm" svg:x="17.437cm" svg:y="11.914cm">
          <draw:text-box>
            <text:p text:style-name="P2"><text:span text:style-name="T47">∙</text:span></text:p>
          </draw:text-box>
        </draw:frame>
        <draw:frame draw:style-name="gr4" draw:text-style-name="P5" draw:layer="layout" svg:width="4.763cm" svg:height="4.689cm" svg:x="24.1cm" svg:y="10.593cm">
          <draw:image xlink:href="Pictures/10000000000000DF000000DC84499CC9.jpg" xlink:type="simple" xlink:show="embed" xlink:actuate="onLoad" draw:mime-type="image/jpeg">
            <text:p/>
          </draw:image>
        </draw:frame>
        <draw:frame draw:style-name="gr30" draw:text-style-name="P21" draw:layer="layout" svg:width="0.706cm" svg:height="0.708cm" svg:x="22.939cm" svg:y="12.221cm">
          <draw:text-box>
            <text:p text:style-name="P2"><text:span text:style-name="T45">=</text:span></text:p>
          </draw:text-box>
        </draw:frame>
        <draw:frame draw:style-name="gr10" draw:text-style-name="P10" draw:layer="layout" svg:width="5.407cm" svg:height="0.661cm" svg:x="23.459cm" svg:y="6.25cm">
          <draw:text-box>
            <text:p text:style-name="P2"><text:span text:style-name="T48">For each location:</text:span></text:p>
          </draw:text-box>
        </draw:frame>
        <draw:frame draw:style-name="gr10" draw:text-style-name="P10" draw:layer="layout" svg:width="0.562cm" svg:height="0.628cm" svg:x="23.459cm" svg:y="6.943cm">
          <draw:text-box>
            <text:p text:style-name="P2"><text:span text:style-name="T49">➢</text:span></text:p>
          </draw:text-box>
        </draw:frame>
        <draw:frame draw:style-name="gr10" draw:text-style-name="P10" draw:layer="layout" svg:width="8.684cm" svg:height="0.661cm" svg:x="24.255cm" svg:y="6.919cm">
          <draw:text-box>
            <text:p text:style-name="P2"><text:span text:style-name="T32">High value </text:span><text:span text:style-name="T12">= important feature</text:span></text:p>
          </draw:text-box>
        </draw:frame>
        <draw:frame draw:style-name="gr10" draw:text-style-name="P10" draw:layer="layout" svg:width="0.562cm" svg:height="0.628cm" svg:x="23.459cm" svg:y="7.62cm">
          <draw:text-box>
            <text:p text:style-name="P2"><text:span text:style-name="T50">➢</text:span></text:p>
          </draw:text-box>
        </draw:frame>
        <draw:frame draw:style-name="gr10" draw:text-style-name="P10" draw:layer="layout" svg:width="7.569cm" svg:height="0.661cm" svg:x="24.255cm" svg:y="7.596cm">
          <draw:text-box>
            <text:p text:style-name="P2"><text:span text:style-name="T51">Zero value </text:span><text:span text:style-name="T12">= not important</text:span></text:p>
          </draw:text-box>
        </draw:frame>
        <draw:frame draw:style-name="gr10" draw:text-style-name="P10" draw:layer="layout" svg:width="0.562cm" svg:height="0.628cm" svg:x="23.459cm" svg:y="8.302cm">
          <draw:text-box>
            <text:p text:style-name="P2"><text:span text:style-name="T39">➢</text:span></text:p>
          </draw:text-box>
        </draw:frame>
        <draw:frame draw:style-name="gr10" draw:text-style-name="P10" draw:layer="layout" svg:width="8.752cm" svg:height="0.661cm" svg:x="24.255cm" svg:y="8.277cm">
          <draw:text-box>
            <text:p text:style-name="P2"><text:span text:style-name="T52">Guided Backprop removes all </text:span></text:p>
          </draw:text-box>
        </draw:frame>
        <draw:frame draw:style-name="gr10" draw:text-style-name="P10" draw:layer="layout" svg:width="8.188cm" svg:height="0.661cm" svg:x="24.255cm" svg:y="8.951cm">
          <draw:text-box>
            <text:p text:style-name="P2"><text:span text:style-name="T52">negative influences</text:span><text:span text:style-name="T12">, so only </text:span></text:p>
          </draw:text-box>
        </draw:frame>
        <draw:frame draw:style-name="gr10" draw:text-style-name="P10" draw:layer="layout" svg:width="7.422cm" svg:height="0.661cm" svg:x="24.255cm" svg:y="9.628cm">
          <draw:text-box>
            <text:p text:style-name="P2"><text:span text:style-name="T12">positive evidence is shown.</text:span></text:p>
          </draw:text-box>
        </draw:frame>
        <draw:frame draw:style-name="gr10" draw:text-style-name="P10" draw:layer="layout" svg:width="14.438cm" svg:height="0.661cm" svg:x="1.637cm" svg:y="15.318cm">
          <draw:text-box>
            <text:p text:style-name="P2"><text:span text:style-name="T52">Value 6: </text:span><text:span text:style-name="T12">This is the </text:span><text:span text:style-name="T32">strongest</text:span><text:span text:style-name="T12"> gradient. This region </text:span></text:p>
          </draw:text-box>
        </draw:frame>
        <draw:frame draw:style-name="gr10" draw:text-style-name="P10" draw:layer="layout" svg:width="13.042cm" svg:height="0.661cm" svg:x="1.637cm" svg:y="15.996cm">
          <draw:text-box>
            <text:p text:style-name="P2"><text:span text:style-name="T32">strongly supports the final class prediction</text:span><text:span text:style-name="T52">. </text:span></text:p>
          </draw:text-box>
        </draw:frame>
        <draw:frame draw:style-name="gr10" draw:text-style-name="P10" draw:layer="layout" svg:width="0.562cm" svg:height="0.628cm" svg:x="1.637cm" svg:y="16.694cm">
          <draw:text-box>
            <text:p text:style-name="P2"><text:span text:style-name="T53">•</text:span></text:p>
          </draw:text-box>
        </draw:frame>
        <draw:frame draw:style-name="gr10" draw:text-style-name="P10" draw:layer="layout" svg:width="16.182cm" svg:height="0.661cm" svg:x="1.836cm" svg:y="16.673cm">
          <draw:text-box>
            <text:p text:style-name="P2"><text:span text:style-name="T12">Meaning the model heavily relied on this part of the image </text:span></text:p>
          </draw:text-box>
        </draw:frame>
        <draw:frame draw:style-name="gr10" draw:text-style-name="P10" draw:layer="layout" svg:width="2.682cm" svg:height="0.661cm" svg:x="1.637cm" svg:y="17.351cm">
          <draw:text-box>
            <text:p text:style-name="P2"><text:span text:style-name="T12">or feature</text:span></text:p>
          </draw:text-box>
        </draw:frame>
        <draw:frame draw:style-name="gr10" draw:text-style-name="P10" draw:layer="layout" svg:width="5.508cm" svg:height="0.661cm" svg:x="18.965cm" svg:y="15.102cm">
          <draw:text-box>
            <text:p text:style-name="P2"><text:span text:style-name="T12">If you visualize this:</text:span></text:p>
          </draw:text-box>
        </draw:frame>
        <draw:frame draw:style-name="gr10" draw:text-style-name="P10" draw:layer="layout" svg:width="0.562cm" svg:height="0.628cm" svg:x="18.965cm" svg:y="15.804cm">
          <draw:text-box>
            <text:p text:style-name="P2"><text:span text:style-name="T39">➢</text:span></text:p>
          </draw:text-box>
        </draw:frame>
        <draw:frame draw:style-name="gr10" draw:text-style-name="P10" draw:layer="layout" svg:width="11.645cm" svg:height="0.661cm" svg:x="19.761cm" svg:y="15.78cm">
          <draw:text-box>
            <text:p text:style-name="P2"><text:span text:style-name="T12">the cell containing </text:span><text:span text:style-name="T54">6</text:span><text:span text:style-name="T12"> will appear </text:span><text:span text:style-name="T54">brightest</text:span></text:p>
          </draw:text-box>
        </draw:frame>
        <draw:frame draw:style-name="gr10" draw:text-style-name="P10" draw:layer="layout" svg:width="0.562cm" svg:height="0.628cm" svg:x="18.965cm" svg:y="16.481cm">
          <draw:text-box>
            <text:p text:style-name="P2"><text:span text:style-name="T39">➢</text:span></text:p>
          </draw:text-box>
        </draw:frame>
        <draw:frame draw:style-name="gr10" draw:text-style-name="P10" draw:layer="layout" svg:width="12.062cm" svg:height="0.661cm" svg:x="19.761cm" svg:y="16.457cm">
          <draw:text-box>
            <text:p text:style-name="P2"><text:span text:style-name="T12">the cell containing </text:span><text:span text:style-name="T55">3</text:span><text:span text:style-name="T12"> will appear </text:span><text:span text:style-name="T55">less bright</text:span></text:p>
          </draw:text-box>
        </draw:frame>
        <draw:frame draw:style-name="gr10" draw:text-style-name="P10" draw:layer="layout" svg:width="0.562cm" svg:height="0.628cm" svg:x="18.965cm" svg:y="17.159cm">
          <draw:text-box>
            <text:p text:style-name="P2"><text:span text:style-name="T39">➢</text:span></text:p>
          </draw:text-box>
        </draw:frame>
        <draw:frame draw:style-name="gr10" draw:text-style-name="P10" draw:layer="layout" svg:width="7.851cm" svg:height="0.661cm" svg:x="19.761cm" svg:y="17.134cm">
          <draw:text-box>
            <text:p text:style-name="P2"><text:span text:style-name="T12">cells with </text:span><text:span text:style-name="T52">0 </text:span><text:span text:style-name="T12">will appear </text:span><text:span text:style-name="T52">dark</text:span></text:p>
          </draw:text-box>
        </draw:frame>
        <draw:path draw:style-name="gr35" draw:text-style-name="P5" draw:layer="layout" svg:width="7.879cm" svg:height="3.031cm" svg:x="9.219cm" svg:y="2.187cm" svg:viewBox="0 0 7880 3032" svg:d="M0 505c0-279 226-505 505-505h6869c279 0 506 226 506 505v2022c0 279-227 505-506 505h-6869c-279 0-505-226-505-505z">
          <text:p/>
        </draw:path>
        <draw:frame draw:style-name="gr10" draw:text-style-name="P10" draw:layer="layout" svg:width="14.01cm" svg:height="0.661cm" svg:x="18.965cm" svg:y="17.812cm">
          <draw:text-box>
            <text:p text:style-name="P2"><text:span text:style-name="T12">This becomes the </text:span><text:span text:style-name="T52">saliency map </text:span><text:span text:style-name="T12">(importance map).</text:span></text:p>
          </draw:text-box>
        </draw:frame>
        <draw:frame draw:style-name="gr6" draw:text-style-name="P7" draw:layer="layout" svg:width="11.051cm" svg:height="0.746cm" svg:x="11.504cm" svg:y="0.899cm">
          <draw:text-box>
            <text:p text:style-name="P2"><text:span text:style-name="T6">Saliency Maps (Vanilla Gradients)</text:span></text:p>
          </draw:text-box>
        </draw:frame>
        <draw:frame draw:style-name="gr4" draw:text-style-name="P5" draw:layer="layout" svg:width="3.935cm" svg:height="3.601cm" svg:x="12.851cm" svg:y="10.908cm">
          <draw:image xlink:href="Pictures/10000001000001350000011BBD1C4BFA.png" xlink:type="simple" xlink:show="embed" xlink:actuate="onLoad" draw:mime-type="image/png">
            <text:p/>
          </draw:image>
        </draw:frame>
        <draw:frame draw:style-name="gr4" draw:text-style-name="P5" draw:layer="layout" svg:width="4.115cm" svg:height="4.359cm" svg:x="23.201cm" svg:y="0.151cm">
          <draw:image xlink:href="Pictures/10000001000001440000015797F4E492.png" xlink:type="simple" xlink:show="embed" xlink:actuate="onLoad" draw:mime-type="image/png">
            <text:p/>
          </draw:image>
        </draw:frame>
        <draw:frame draw:style-name="gr10" draw:text-style-name="P10" draw:layer="layout" svg:width="26.385cm" svg:height="0.661cm" svg:x="2.979cm" svg:y="5.372cm">
          <draw:text-box>
            <text:p text:style-name="P2"><text:span text:style-name="T12">Standard Backprop mask (forward activations &gt; 0) × DeconvNet mask (backward gradients &gt; 0).</text:span></text:p>
          </draw:text-box>
        </draw:frame>
      </draw:page>
      <draw:page draw:name="page8" draw:style-name="dp1" draw:master-page-name="master-page3">
        <draw:frame draw:style-name="gr13" draw:text-style-name="P11" draw:layer="layout" svg:width="31.952cm" svg:height="18.049cm" svg:x="1.25cm" svg:y="0.5cm">
          <draw:image xlink:href="Pictures/100000010000054C000002FE57AA99EA.png" xlink:type="simple" xlink:show="embed" xlink:actuate="onLoad" draw:mime-type="image/png">
            <text:p/>
          </draw:image>
        </draw:frame>
      </draw:page>
      <draw:page draw:name="page9" draw:style-name="dp1" draw:master-page-name="master-page3">
        <draw:frame draw:style-name="gr13" draw:text-style-name="P11" draw:layer="layout" svg:width="31.897cm" svg:height="18.049cm" svg:x="0.853cm" svg:y="0.701cm">
          <draw:image xlink:href="Pictures/1000000100000550000002F3B19E2206.png" xlink:type="simple" xlink:show="embed" xlink:actuate="onLoad" draw:mime-type="image/png">
            <text:p/>
          </draw:image>
        </draw:frame>
      </draw:page>
      <draw:page draw:name="page10" draw:style-name="dp1" draw:master-page-name="master-page3">
        <draw:frame draw:style-name="gr36" draw:text-style-name="P24" draw:layer="layout" svg:width="18.592cm" svg:height="2cm" svg:x="1.25cm" svg:y="0.75cm">
          <draw:text-box>
            <text:p>Wherever the value in the final gradient map is high-that feature contributed more for classscore output..</text:p>
          </draw:text-box>
        </draw:frame>
        <draw:frame draw:style-name="gr13" draw:text-style-name="P11" draw:layer="layout" svg:width="30cm" svg:height="15.849cm" svg:x="2cm" svg:y="2.75cm">
          <draw:image xlink:href="Pictures/10000001000004EB000002FDA6D885DE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frame draw:style-name="gr13" draw:text-style-name="P25" draw:layer="layout" svg:width="32.104cm" svg:height="18.049cm" svg:x="1cm" svg:y="0.5cm">
          <draw:image xlink:href="Pictures/1000000100000556000003006B83556F.png" xlink:type="simple" xlink:show="embed" xlink:actuate="onLoad" draw:mime-type="image/png">
            <text:p/>
          </draw:image>
        </draw:frame>
      </draw:page>
      <draw:page draw:name="page12" draw:style-name="dp1" draw:master-page-name="master-page3">
        <draw:polygon draw:style-name="gr1" draw:text-style-name="P1" draw:layer="layout" svg:width="33.866cm" svg:height="19.05cm" svg:x="0cm" svg:y="0cm" svg:viewBox="0 0 33867 19051" draw:points="0,19051 33867,19051 33867,0 0,0">
          <text:p/>
        </draw:polygon>
        <draw:frame draw:style-name="gr4" draw:text-style-name="P5" draw:layer="layout" svg:width="5.707cm" svg:height="13.208cm" svg:x="1.803cm" svg:y="3.975cm">
          <draw:image xlink:href="Pictures/10000000000000E20000020B59877B7A.jpg" xlink:type="simple" xlink:show="embed" xlink:actuate="onLoad" draw:mime-type="image/jpeg">
            <text:p/>
          </draw:image>
        </draw:frame>
        <draw:frame draw:style-name="gr5" draw:text-style-name="P6" draw:layer="layout" svg:width="18.894cm" svg:height="1.826cm" svg:x="0.254cm" svg:y="1.347cm">
          <draw:text-box>
            <text:p text:style-name="P2"><text:span text:style-name="T3">Guided Backpropagation</text:span></text:p>
          </draw:text-box>
        </draw:frame>
        <draw:frame draw:style-name="gr4" draw:text-style-name="P5" draw:layer="layout" svg:width="19.333cm" svg:height="9.486cm" svg:x="12.278cm" svg:y="3.486cm">
          <draw:image xlink:href="Pictures/100000000000043400000210241E82FE.jpg" xlink:type="simple" xlink:show="embed" xlink:actuate="onLoad" draw:mime-type="image/jpeg">
            <text:p/>
          </draw:image>
        </draw:frame>
        <draw:frame draw:style-name="gr4" draw:text-style-name="P5" draw:layer="layout" svg:width="6.508cm" svg:height="16.102cm" svg:x="25.555cm" svg:y="3.175cm">
          <draw:image xlink:href="Pictures/10000000000001C200000480229D5921.jpg" xlink:type="simple" xlink:show="embed" xlink:actuate="onLoad" draw:mime-type="image/jpeg">
            <text:p/>
          </draw:image>
        </draw:frame>
        <draw:frame draw:style-name="gr4" draw:text-style-name="P5" draw:layer="layout" svg:width="13.378cm" svg:height="16.102cm" svg:x="12.278cm" svg:y="3.175cm">
          <draw:image xlink:href="Pictures/100000000000039C000004808D48C0D9.jpg" xlink:type="simple" xlink:show="embed" xlink:actuate="onLoad" draw:mime-type="image/jpeg">
            <text:p/>
          </draw:image>
        </draw:frame>
        <draw:frame draw:style-name="gr10" draw:text-style-name="P10" draw:layer="layout" svg:width="9.303cm" svg:height="0.661cm" svg:x="0.859cm" svg:y="9.905cm">
          <draw:text-box>
            <text:p text:style-name="P2"><text:span text:style-name="T12">Saliency Maps (Vanilla Gradients)</text:span></text:p>
          </draw:text-box>
        </draw:frame>
        <draw:frame draw:style-name="gr4" draw:text-style-name="P5" draw:layer="layout" svg:width="4.115cm" svg:height="4.359cm" svg:x="7.229cm" svg:y="3.971cm">
          <draw:image xlink:href="Pictures/10000001000001440000015797F4E492.png" xlink:type="simple" xlink:show="embed" xlink:actuate="onLoad" draw:mime-type="image/png">
            <text:p/>
          </draw:image>
        </draw:frame>
        <draw:frame draw:style-name="gr4" draw:text-style-name="P5" draw:layer="layout" svg:width="4.763cm" svg:height="4.689cm" svg:x="7.099cm" svg:y="11.226cm">
          <draw:image xlink:href="Pictures/10000000000000DF000000DC84499CC9.jpg" xlink:type="simple" xlink:show="embed" xlink:actuate="onLoad" draw:mime-type="image/jpeg">
            <text:p/>
          </draw:image>
        </draw:frame>
        <draw:frame draw:style-name="gr21" draw:text-style-name="P16" draw:layer="layout" svg:width="5.618cm" svg:height="0.581cm" svg:x="0.701cm" svg:y="18.079cm">
          <draw:text-box>
            <text:p text:style-name="P2"><text:span text:style-name="T38">Image source: Interne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rial" svg:font-family="Arial"/>
    <style:font-face style:name="Arial1" svg:font-family="Arial" style:font-family-generic="system" style:font-pitch="variable"/>
    <style:font-face style:name="Bookman Old Style" svg:font-family="'Bookman Old Style'"/>
    <style:font-face style:name="BookmanOldStyle" svg:font-family="BookmanOldStyle"/>
    <style:font-face style:name="CambriaMath" svg:font-family="CambriaMat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92" draw:style="rect" draw:dots1="1" draw:dots1-length="0.317cm" draw:distance="0.23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3-28T13:29:09.757820300</dc:date>
    <meta:editing-duration>PT1H10M8S</meta:editing-duration>
    <meta:editing-cycles>1</meta:editing-cycles>
    <meta:document-statistic meta:object-count="359"/>
    <meta:generator>LibreOffice/25.2.7.2$Windows_X86_64 LibreOffice_project/5cbfd1ab6520636bb5f7b99185aa69bd7456825d</meta:generator>
  </office:meta>
</office:document-meta>
</file>